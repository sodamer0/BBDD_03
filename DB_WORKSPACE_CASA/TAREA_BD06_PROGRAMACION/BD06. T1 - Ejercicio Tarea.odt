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1E800000293D781DC92.png" manifest:media-type="image/png"/>
  <manifest:file-entry manifest:full-path="Pictures/100000010000012E0000005F373E555C.png" manifest:media-type="image/png"/>
  <manifest:file-entry manifest:full-path="Pictures/10000001000001F0000002BB48A24C59.png" manifest:media-type="image/png"/>
  <manifest:file-entry manifest:full-path="Pictures/100000010000013200000060EE42D2AD.png" manifest:media-type="image/png"/>
  <manifest:file-entry manifest:full-path="Pictures/10000001000001180000006261EE4DE0.png" manifest:media-type="image/png"/>
  <manifest:file-entry manifest:full-path="Pictures/1000000100000136000000619299AB4A.png" manifest:media-type="image/png"/>
  <manifest:file-entry manifest:full-path="Pictures/100000010000013F000000661C5C71AA.png" manifest:media-type="image/png"/>
  <manifest:file-entry manifest:full-path="Pictures/10000001000001230000006B54BB665E.png" manifest:media-type="image/png"/>
  <manifest:file-entry manifest:full-path="Pictures/100000010000011F00000066533F0E5F.png" manifest:media-type="image/png"/>
  <manifest:file-entry manifest:full-path="Pictures/100000010000012D00000064A616347F.png" manifest:media-type="image/png"/>
  <manifest:file-entry manifest:full-path="Pictures/100000010000013D0000009F02891197.png" manifest:media-type="image/png"/>
  <manifest:file-entry manifest:full-path="Pictures/100000010000012800000097CEF182C8.png" manifest:media-type="image/png"/>
  <manifest:file-entry manifest:full-path="Pictures/100000010000018300000068A4193E31.png" manifest:media-type="image/png"/>
  <manifest:file-entry manifest:full-path="Pictures/10000001000002EE00000073024D7ED6.png" manifest:media-type="image/png"/>
  <manifest:file-entry manifest:full-path="Pictures/100000010000017900000063630B2ECE.png" manifest:media-type="image/png"/>
  <manifest:file-entry manifest:full-path="Pictures/100000010000016F000000634657839E.png" manifest:media-type="image/png"/>
  <manifest:file-entry manifest:full-path="Pictures/100000010000010B0000025395DF276C.png" manifest:media-type="image/png"/>
  <manifest:file-entry manifest:full-path="Pictures/10000001000001680000022D831DAD1D.png" manifest:media-type="image/png"/>
  <manifest:file-entry manifest:full-path="Pictures/10000001000002BE00000067A82C0C00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Consolas" svg:font-family="Consolas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wiss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áboa1" style:family="table">
      <style:table-properties style:width="16.88cm" fo:margin-left="0.169cm" table:align="left"/>
    </style:style>
    <style:style style:name="Táboa1.A" style:family="table-column">
      <style:table-column-properties style:column-width="16.88cm"/>
    </style:style>
    <style:style style:name="Táboa1.A1" style:family="table-cell">
      <style:table-cell-properties fo:background-color="#dee6ef" fo:padding="0.097cm" fo:border="0.5pt solid #000000">
        <style:background-image/>
      </style:table-cell-properties>
    </style:style>
    <style:style style:name="Táboa2" style:family="table">
      <style:table-properties style:width="16.801cm" fo:margin-left="0.116cm" table:align="left"/>
    </style:style>
    <style:style style:name="Táboa2.A" style:family="table-column">
      <style:table-column-properties style:column-width="16.801cm"/>
    </style:style>
    <style:style style:name="Táboa2.A1" style:family="table-cell">
      <style:table-cell-properties fo:background-color="#dee6ef" fo:padding="0.097cm" fo:border="0.5pt solid #000000">
        <style:background-image/>
      </style:table-cell-properties>
    </style:style>
    <style:style style:name="Táboa3" style:family="table">
      <style:table-properties style:width="16.801cm" fo:margin-left="0.328cm" table:align="left"/>
    </style:style>
    <style:style style:name="Táboa3.A" style:family="table-column">
      <style:table-column-properties style:column-width="16.801cm"/>
    </style:style>
    <style:style style:name="Táboa3.A1" style:family="table-cell">
      <style:table-cell-properties fo:background-color="#dee6ef" fo:padding="0.097cm" fo:border="0.5pt solid #000000">
        <style:background-image/>
      </style:table-cell-properties>
    </style:style>
    <style:style style:name="Táboa4" style:family="table">
      <style:table-properties style:width="16.933cm" fo:margin-left="0.064cm" table:align="left"/>
    </style:style>
    <style:style style:name="Táboa4.A" style:family="table-column">
      <style:table-column-properties style:column-width="16.933cm"/>
    </style:style>
    <style:style style:name="Táboa4.A1" style:family="table-cell">
      <style:table-cell-properties fo:background-color="#dee6ef" fo:padding="0.097cm" fo:border="0.5pt solid #000000">
        <style:background-image/>
      </style:table-cell-properties>
    </style:style>
    <style:style style:name="Táboa5" style:family="table">
      <style:table-properties style:width="17.013cm" fo:margin-left="0.037cm" table:align="left"/>
    </style:style>
    <style:style style:name="Táboa5.A" style:family="table-column">
      <style:table-column-properties style:column-width="17.013cm"/>
    </style:style>
    <style:style style:name="Táboa5.A1" style:family="table-cell">
      <style:table-cell-properties fo:background-color="#dee6ef" fo:padding="0.097cm" fo:border="0.5pt solid #000000">
        <style:background-image/>
      </style:table-cell-properties>
    </style:style>
    <style:style style:name="Táboa6" style:family="table">
      <style:table-properties style:width="16.907cm" fo:margin-left="0.116cm" table:align="left"/>
    </style:style>
    <style:style style:name="Táboa6.A" style:family="table-column">
      <style:table-column-properties style:column-width="16.907cm"/>
    </style:style>
    <style:style style:name="Táboa6.A1" style:family="table-cell">
      <style:table-cell-properties fo:background-color="#dee6ef" fo:padding="0.097cm" fo:border="0.5pt solid #000000">
        <style:background-image/>
      </style:table-cell-properties>
    </style:style>
    <style:style style:name="Táboa7" style:family="table">
      <style:table-properties style:width="16.907cm" fo:margin-left="0.064cm" table:align="left"/>
    </style:style>
    <style:style style:name="Táboa7.A" style:family="table-column">
      <style:table-column-properties style:column-width="16.907cm"/>
    </style:style>
    <style:style style:name="Táboa7.A1" style:family="table-cell">
      <style:table-cell-properties fo:background-color="#dee6ef" fo:padding="0.097cm" fo:border="0.5pt solid #000000">
        <style:background-image/>
      </style:table-cell-properties>
    </style:style>
    <style:style style:name="Táboa8" style:family="table">
      <style:table-properties style:width="17.013cm" fo:margin-left="0.064cm" table:align="left"/>
    </style:style>
    <style:style style:name="Táboa8.A" style:family="table-column">
      <style:table-column-properties style:column-width="17.013cm"/>
    </style:style>
    <style:style style:name="Táboa8.A1" style:family="table-cell">
      <style:table-cell-properties fo:background-color="#dee6ef" fo:padding="0.097cm" fo:border="0.5pt solid #000000">
        <style:background-image/>
      </style:table-cell-properties>
    </style:style>
    <style:style style:name="Táboa9" style:family="table">
      <style:table-properties style:width="16.907cm" fo:margin-left="0.037cm" table:align="left"/>
    </style:style>
    <style:style style:name="Táboa9.A" style:family="table-column">
      <style:table-column-properties style:column-width="16.907cm"/>
    </style:style>
    <style:style style:name="Táboa9.A1" style:family="table-cell">
      <style:table-cell-properties fo:background-color="#dee6ef" fo:padding="0.097cm" fo:border="0.5pt solid #000000">
        <style:background-image/>
      </style:table-cell-properties>
    </style:style>
    <style:style style:name="Táboa10" style:family="table">
      <style:table-properties style:width="16.907cm" fo:margin-left="0.116cm" table:align="left"/>
    </style:style>
    <style:style style:name="Táboa10.A" style:family="table-column">
      <style:table-column-properties style:column-width="16.907cm"/>
    </style:style>
    <style:style style:name="Táboa10.A1" style:family="table-cell">
      <style:table-cell-properties fo:background-color="#dee6ef" fo:padding="0.097cm" fo:border="0.5pt solid #000000">
        <style:background-image/>
      </style:table-cell-properties>
    </style:style>
    <style:style style:name="P1" style:family="paragraph" style:parent-style-name="Standard">
      <loext:graphic-properties draw:fill="solid" draw:fill-color="#d3d3d3" draw:fill-gradient-name="gradient" draw:fill-hatch-name="hatch"/>
      <style:paragraph-properties fo:line-height="150%" fo:text-align="justify" style:justify-single-word="false" fo:break-before="page" fo:background-color="#d3d3d3" fo:padding="0.049cm" fo:border-left="none" fo:border-right="none" fo:border-top="none" fo:border-bottom="0.74pt solid #000000" style:join-border="false"/>
      <style:text-properties style:font-name="Calibri" fo:font-weight="bold" officeooo:rsid="0042092b" officeooo:paragraph-rsid="00282f4f" style:font-weight-asian="bold" style:font-weight-complex="bold"/>
    </style:style>
    <style:style style:name="P2" style:family="paragraph" style:parent-style-name="Text_20_body">
      <style:paragraph-properties fo:margin-left="0.499cm" fo:margin-right="0cm" fo:margin-top="0cm" fo:margin-bottom="0.3cm" style:contextual-spacing="false" fo:line-height="115%" fo:text-align="justify" style:justify-single-word="false" fo:orphans="2" fo:widows="2" fo:text-indent="0cm" style:auto-text-indent="false"/>
      <style:text-properties style:font-name="Calibri" fo:font-size="10pt" officeooo:rsid="0144a13c" officeooo:paragraph-rsid="0144a13c" style:font-size-asian="10pt" style:font-size-complex="10pt"/>
    </style:style>
    <style:style style:name="P3" style:family="paragraph" style:parent-style-name="Text_20_body" style:list-style-name="L1">
      <style:paragraph-properties fo:margin-top="0cm" fo:margin-bottom="0.3cm" style:contextual-spacing="false" fo:line-height="115%" fo:text-align="justify" style:justify-single-word="false" fo:orphans="2" fo:widows="2"/>
      <style:text-properties style:font-name="Calibri" fo:font-size="10pt" fo:font-weight="bold" officeooo:rsid="0144a13c" officeooo:paragraph-rsid="0144a13c" style:font-size-asian="10pt" style:font-weight-asian="bold" style:font-size-complex="10pt" style:font-weight-complex="bold"/>
    </style:style>
    <style:style style:name="P4" style:family="paragraph" style:parent-style-name="Text_20_body" style:list-style-name="L1">
      <style:paragraph-properties fo:margin-top="0cm" fo:margin-bottom="0.3cm" style:contextual-spacing="false" fo:line-height="115%" fo:text-align="justify" style:justify-single-word="false" fo:orphans="2" fo:widows="2"/>
      <style:text-properties style:font-name="Calibri" fo:font-size="10pt" officeooo:rsid="0144a13c" officeooo:paragraph-rsid="0153a29f" style:font-size-asian="10pt" style:font-size-complex="10pt"/>
    </style:style>
    <style:style style:name="P5" style:family="paragraph" style:parent-style-name="Standard">
      <style:paragraph-properties fo:text-align="start" style:justify-single-word="false" fo:text-indent="0cm" style:auto-text-indent="false"/>
    </style:style>
    <style:style style:name="P6" style:family="paragraph" style:parent-style-name="Standard">
      <style:paragraph-properties fo:text-align="justify" style:justify-single-word="false"/>
      <style:text-properties style:font-name="Comic Sans MS" fo:font-size="7pt" style:font-size-asian="7pt" style:font-size-complex="7pt"/>
    </style:style>
    <style:style style:name="P7" style:family="paragraph" style:parent-style-name="Text_20_body">
      <style:paragraph-properties fo:margin-top="0cm" fo:margin-bottom="0.3cm" style:contextual-spacing="false" fo:line-height="115%" fo:text-align="justify" style:justify-single-word="false" fo:orphans="2" fo:widows="2"/>
      <style:text-properties style:font-name="Calibri" fo:font-size="10pt" officeooo:rsid="0144a13c" officeooo:paragraph-rsid="0144a13c" style:font-size-asian="10pt" style:font-size-complex="10pt"/>
    </style:style>
    <style:style style:name="P8" style:family="paragraph" style:parent-style-name="Text_20_body" style:list-style-name="L1">
      <style:paragraph-properties fo:margin-top="0cm" fo:margin-bottom="0.3cm" style:contextual-spacing="false" fo:line-height="115%" fo:text-align="justify" style:justify-single-word="false" fo:orphans="2" fo:widows="2"/>
      <style:text-properties style:font-name="Calibri" fo:font-size="10pt" officeooo:rsid="0144a13c" officeooo:paragraph-rsid="01559f05" style:font-size-asian="10pt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Comic Sans MS" fo:font-size="7pt" officeooo:paragraph-rsid="014b17d4" style:font-size-asian="7pt" style:font-size-complex="7pt"/>
    </style:style>
    <style:style style:name="P10" style:family="paragraph" style:parent-style-name="Standard">
      <style:paragraph-properties fo:margin-top="0cm" fo:margin-bottom="0.3cm" style:contextual-spacing="false" fo:line-height="115%" fo:text-align="justify" style:justify-single-word="false" fo:orphans="2" fo:widows="2"/>
      <style:text-properties style:font-name="Calibri" fo:font-size="10pt" officeooo:rsid="0144a13c" officeooo:paragraph-rsid="014b17d4" style:font-size-asian="10pt" style:font-size-complex="10pt"/>
    </style:style>
    <style:style style:name="P11" style:family="paragraph" style:parent-style-name="Text_20_body" style:list-style-name="L1">
      <style:paragraph-properties fo:margin-top="0cm" fo:margin-bottom="0.3cm" style:contextual-spacing="false" fo:line-height="115%" fo:text-align="justify" style:justify-single-word="false" fo:orphans="2" fo:widows="2"/>
      <style:text-properties style:font-name="Calibri" fo:font-size="10pt" officeooo:rsid="0144a13c" officeooo:paragraph-rsid="0144a13c" style:font-size-asian="10pt" style:font-size-complex="10pt"/>
    </style:style>
    <style:style style:name="P12" style:family="paragraph" style:parent-style-name="Text_20_body" style:list-style-name="L1">
      <style:paragraph-properties fo:margin-top="0cm" fo:margin-bottom="0.3cm" style:contextual-spacing="false" fo:line-height="115%" fo:text-align="justify" style:justify-single-word="false" fo:orphans="2" fo:widows="2"/>
      <style:text-properties style:font-name="Calibri" fo:font-size="10pt" officeooo:rsid="0144a13c" officeooo:paragraph-rsid="01564fdc" style:font-size-asian="10pt" style:font-size-complex="10pt"/>
    </style:style>
    <style:style style:name="P13" style:family="paragraph" style:parent-style-name="Standard">
      <style:paragraph-properties fo:text-align="start" style:justify-single-word="false" fo:text-indent="0cm" style:auto-text-indent="false"/>
      <style:text-properties style:font-name="Consolas" fo:font-size="10pt" style:font-size-asian="10pt"/>
    </style:style>
    <style:style style:name="P14" style:family="paragraph" style:parent-style-name="Standard">
      <style:paragraph-properties fo:text-align="justify" style:justify-single-word="false"/>
      <style:text-properties style:font-name="Comic Sans MS" fo:font-size="7pt" officeooo:paragraph-rsid="014b342e" style:font-size-asian="7pt" style:font-size-complex="7pt"/>
    </style:style>
    <style:style style:name="P15" style:family="paragraph" style:parent-style-name="Standard">
      <style:paragraph-properties fo:margin-top="0cm" fo:margin-bottom="0.3cm" style:contextual-spacing="false" fo:line-height="115%" fo:text-align="justify" style:justify-single-word="false" fo:orphans="2" fo:widows="2"/>
      <style:text-properties style:font-name="Calibri" fo:font-size="10pt" officeooo:rsid="0144a13c" officeooo:paragraph-rsid="014b342e" style:font-size-asian="10pt" style:font-size-complex="10pt"/>
    </style:style>
    <style:style style:name="P16" style:family="paragraph" style:parent-style-name="Standard">
      <style:paragraph-properties fo:margin-top="0cm" fo:margin-bottom="0.3cm" style:contextual-spacing="false" fo:line-height="115%" fo:text-align="justify" style:justify-single-word="false" fo:orphans="2" fo:widows="2"/>
      <style:text-properties style:font-name="Calibri" fo:font-size="10pt" officeooo:rsid="0168b7cc" officeooo:paragraph-rsid="0168b7cc" style:font-size-asian="10pt" style:font-size-complex="10pt"/>
    </style:style>
    <style:style style:name="P17" style:family="paragraph" style:parent-style-name="Text_20_body" style:list-style-name="L1">
      <style:paragraph-properties fo:margin-top="0cm" fo:margin-bottom="0.3cm" style:contextual-spacing="false" fo:line-height="115%" fo:text-align="justify" style:justify-single-word="false" fo:orphans="2" fo:widows="2"/>
      <style:text-properties style:font-name="Calibri" fo:font-size="10pt" officeooo:rsid="0144a13c" officeooo:paragraph-rsid="01572284" style:font-size-asian="10pt" style:font-size-complex="10pt"/>
    </style:style>
    <style:style style:name="P18" style:family="paragraph" style:parent-style-name="Standard">
      <style:paragraph-properties fo:text-align="justify" style:justify-single-word="false"/>
      <style:text-properties style:font-name="Comic Sans MS" fo:font-size="7pt" officeooo:paragraph-rsid="014c7df4" style:font-size-asian="7pt" style:font-size-complex="7pt"/>
    </style:style>
    <style:style style:name="P19" style:family="paragraph" style:parent-style-name="Standard">
      <style:paragraph-properties fo:text-align="justify" style:justify-single-word="false"/>
      <style:text-properties officeooo:paragraph-rsid="016f71e5"/>
    </style:style>
    <style:style style:name="P20" style:family="paragraph" style:parent-style-name="Standard">
      <style:paragraph-properties fo:margin-top="0cm" fo:margin-bottom="0.3cm" style:contextual-spacing="false" fo:line-height="115%" fo:text-align="justify" style:justify-single-word="false" fo:orphans="2" fo:widows="2"/>
      <style:text-properties style:font-name="Calibri" fo:font-size="10pt" officeooo:rsid="0144a13c" officeooo:paragraph-rsid="014c7df4" style:font-size-asian="10pt" style:font-size-complex="10pt"/>
    </style:style>
    <style:style style:name="P21" style:family="paragraph" style:parent-style-name="Text_20_body" style:list-style-name="L1">
      <style:paragraph-properties fo:margin-top="0cm" fo:margin-bottom="0.3cm" style:contextual-spacing="false" fo:line-height="115%" fo:text-align="justify" style:justify-single-word="false" fo:orphans="2" fo:widows="2"/>
      <style:text-properties style:font-name="Calibri" fo:font-size="10pt" officeooo:rsid="0144a13c" officeooo:paragraph-rsid="01576de4" style:font-size-asian="10pt" style:font-size-complex="10pt"/>
    </style:style>
    <style:style style:name="P22" style:family="paragraph" style:parent-style-name="Text_20_body" style:list-style-name="L1">
      <style:paragraph-properties fo:margin-top="0cm" fo:margin-bottom="0.3cm" style:contextual-spacing="false" fo:line-height="115%" fo:text-align="justify" style:justify-single-word="false" fo:orphans="2" fo:widows="2"/>
      <style:text-properties style:font-name="Calibri" fo:font-size="10pt" officeooo:rsid="0144a13c" officeooo:paragraph-rsid="0158a320" style:font-size-asian="10pt" style:font-size-complex="10pt"/>
    </style:style>
    <style:style style:name="P23" style:family="paragraph" style:parent-style-name="Text_20_body" style:list-style-name="L1">
      <style:paragraph-properties fo:margin-top="0cm" fo:margin-bottom="0.3cm" style:contextual-spacing="false" fo:line-height="115%" fo:text-align="justify" style:justify-single-word="false" fo:orphans="2" fo:widows="2"/>
      <style:text-properties style:font-name="Calibri" fo:font-size="10pt" officeooo:rsid="0144a13c" officeooo:paragraph-rsid="0159a71d" style:font-size-asian="10pt" style:font-size-complex="10pt"/>
    </style:style>
    <style:style style:name="P24" style:family="paragraph" style:parent-style-name="Standard">
      <style:paragraph-properties fo:text-align="start" style:justify-single-word="false" fo:text-indent="0cm" style:auto-text-indent="false"/>
      <style:text-properties officeooo:paragraph-rsid="016d2357"/>
    </style:style>
    <style:style style:name="P25" style:family="paragraph" style:parent-style-name="Text_20_body" style:list-style-name="L1">
      <style:paragraph-properties fo:margin-top="0cm" fo:margin-bottom="0.3cm" style:contextual-spacing="false" fo:line-height="115%" fo:text-align="justify" style:justify-single-word="false" fo:orphans="2" fo:widows="2"/>
      <style:text-properties style:font-name="Calibri" fo:font-size="10pt" officeooo:rsid="0144a13c" officeooo:paragraph-rsid="015cf0cd" style:font-size-asian="10pt" style:font-size-complex="10pt"/>
    </style:style>
    <style:style style:name="P26" style:family="paragraph" style:parent-style-name="Standard">
      <style:paragraph-properties fo:text-align="justify" style:justify-single-word="false"/>
      <style:text-properties fo:color="#cccccc" loext:opacity="100%" style:font-name="Consolas" fo:font-size="10pt" officeooo:paragraph-rsid="014c7df4" style:font-size-asian="10pt" style:font-size-complex="7pt"/>
    </style:style>
    <style:style style:name="P27" style:family="paragraph" style:parent-style-name="Text_20_body">
      <style:paragraph-properties fo:margin-left="2.501cm" fo:margin-top="0cm" fo:margin-bottom="0.3cm" style:contextual-spacing="false" fo:line-height="115%" fo:text-align="justify" style:justify-single-word="false" fo:orphans="2" fo:widows="2" fo:text-indent="0cm" style:auto-text-indent="false"/>
      <style:text-properties style:font-name="Calibri" fo:font-size="10pt" officeooo:rsid="0144a13c" officeooo:paragraph-rsid="01509840" style:font-size-asian="10pt" style:font-size-complex="10pt"/>
    </style:style>
    <style:style style:name="P28" style:family="paragraph" style:parent-style-name="Text_20_body">
      <style:paragraph-properties fo:margin-left="0.499cm" fo:margin-right="0cm" fo:margin-top="0cm" fo:margin-bottom="0.3cm" style:contextual-spacing="false" fo:line-height="115%" fo:text-align="justify" style:justify-single-word="false" fo:orphans="2" fo:widows="2" fo:text-indent="0cm" style:auto-text-indent="false"/>
      <style:text-properties style:font-name="Calibri" fo:font-size="10pt" officeooo:rsid="0131caa3" officeooo:paragraph-rsid="0131caa3" style:font-size-asian="10pt" style:font-size-complex="10pt"/>
    </style:style>
    <style:style style:name="P29" style:family="paragraph" style:parent-style-name="Text_20_body">
      <style:paragraph-properties fo:margin-left="0.499cm" fo:margin-right="0cm" fo:margin-top="0cm" fo:margin-bottom="0.3cm" style:contextual-spacing="false" fo:line-height="115%" fo:text-align="justify" style:justify-single-word="false" fo:orphans="2" fo:widows="2" fo:text-indent="0cm" style:auto-text-indent="false"/>
      <style:text-properties style:font-name="Calibri" fo:font-size="10pt" officeooo:paragraph-rsid="0129ff9c" style:font-size-asian="10pt" style:font-size-complex="10pt"/>
    </style:style>
    <style:style style:name="T1" style:family="text">
      <style:text-properties officeooo:rsid="0153a29f"/>
    </style:style>
    <style:style style:name="T2" style:family="text">
      <style:text-properties style:font-name="Comic Sans MS" officeooo:rsid="0153a29f"/>
    </style:style>
    <style:style style:name="T3" style:family="text">
      <style:text-properties style:font-name="Comic Sans MS" fo:font-size="7pt" officeooo:rsid="0153a29f" style:font-size-asian="7pt" style:font-size-complex="7pt"/>
    </style:style>
    <style:style style:name="T4" style:family="text">
      <style:text-properties style:font-name="Consolas" fo:font-size="10pt" style:font-size-asian="10pt"/>
    </style:style>
    <style:style style:name="T5" style:family="text">
      <style:text-properties fo:color="#739eca" loext:opacity="100%" style:font-name="Consolas" fo:font-size="10pt" fo:font-weight="bold" style:font-size-asian="10pt" style:font-weight-asian="bold"/>
    </style:style>
    <style:style style:name="T6" style:family="text">
      <style:text-properties fo:color="#cccccc" loext:opacity="100%" style:font-name="Consolas" fo:font-size="10pt" style:font-size-asian="10pt"/>
    </style:style>
    <style:style style:name="T7" style:family="text">
      <style:text-properties fo:color="#b788d3" loext:opacity="100%" style:font-name="Consolas" fo:font-size="10pt" style:font-size-asian="10pt"/>
    </style:style>
    <style:style style:name="T8" style:family="text">
      <style:text-properties fo:color="#00b8b8" loext:opacity="100%" style:font-name="Consolas" fo:font-size="10pt" style:font-size-asian="10pt"/>
    </style:style>
    <style:style style:name="T9" style:family="text">
      <style:text-properties fo:color="#9e9e9e" loext:opacity="100%" style:font-name="Consolas" fo:font-size="10pt" style:font-size-asian="10pt"/>
    </style:style>
    <style:style style:name="T10" style:family="text">
      <style:text-properties fo:color="#eecc64" loext:opacity="100%" style:font-name="Consolas" fo:font-size="10pt" style:font-size-asian="10pt"/>
    </style:style>
    <style:style style:name="T11" style:family="text">
      <style:text-properties officeooo:rsid="01559f05"/>
    </style:style>
    <style:style style:name="T12" style:family="text">
      <style:text-properties style:font-name="Comic Sans MS" officeooo:rsid="01559f05"/>
    </style:style>
    <style:style style:name="T13" style:family="text">
      <style:text-properties fo:color="#c1aa6c" loext:opacity="100%" style:font-name="Consolas" fo:font-size="10pt" fo:font-weight="bold" style:font-size-asian="10pt" style:font-weight-asian="bold"/>
    </style:style>
    <style:style style:name="T14" style:family="text">
      <style:text-properties fo:color="#9e9e9e" loext:opacity="100%" style:font-name="Consolas" fo:font-size="10pt" style:text-underline-style="none" style:font-size-asian="10pt"/>
    </style:style>
    <style:style style:name="T15" style:family="text">
      <style:text-properties fo:color="#cccccc" loext:opacity="100%" style:font-name="Consolas" fo:font-size="10pt" style:text-underline-style="none" style:font-size-asian="10pt"/>
    </style:style>
    <style:style style:name="T16" style:family="text">
      <style:text-properties fo:color="#b19b9b" loext:opacity="100%" style:font-name="Consolas" fo:font-size="10pt" style:text-underline-style="none" style:font-size-asian="10pt"/>
    </style:style>
    <style:style style:name="T17" style:family="text">
      <style:text-properties fo:color="#c0c0c0" loext:opacity="100%" style:font-name="Consolas" fo:font-size="10pt" style:font-size-asian="10pt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1564fdc"/>
    </style:style>
    <style:style style:name="T20" style:family="text">
      <style:text-properties style:font-name="Comic Sans MS" officeooo:rsid="01564fdc"/>
    </style:style>
    <style:style style:name="T21" style:family="text">
      <style:text-properties fo:color="#669768" loext:opacity="100%" style:font-name="Consolas" fo:font-size="10pt" style:font-size-asian="10pt"/>
    </style:style>
    <style:style style:name="T22" style:family="text">
      <style:text-properties fo:color="#d3bad3" loext:opacity="100%" style:font-name="Consolas" fo:font-size="10pt" fo:font-weight="bold" style:font-size-asian="10pt" style:font-weight-asian="bold"/>
    </style:style>
    <style:style style:name="T23" style:family="text">
      <style:text-properties fo:color="#b788d3" loext:opacity="100%" style:font-name="Consolas" fo:font-size="10pt" fo:font-style="italic" style:font-size-asian="10pt" style:font-style-asian="italic"/>
    </style:style>
    <style:style style:name="T24" style:family="text">
      <style:text-properties style:font-name="Comic Sans MS" fo:font-size="7pt" officeooo:rsid="01564fdc" style:font-size-asian="7pt" style:font-size-complex="7pt"/>
    </style:style>
    <style:style style:name="T25" style:family="text">
      <style:text-properties officeooo:rsid="01572284"/>
    </style:style>
    <style:style style:name="T26" style:family="text">
      <style:text-properties style:font-name="Comic Sans MS" officeooo:rsid="01572284"/>
    </style:style>
    <style:style style:name="T27" style:family="text">
      <style:text-properties fo:color="#739eca" loext:opacity="100%" style:font-name="Consolas" fo:font-size="10pt" fo:font-weight="bold" style:font-size-asian="10pt" style:font-weight-asian="bold" style:font-size-complex="7pt"/>
    </style:style>
    <style:style style:name="T28" style:family="text">
      <style:text-properties fo:color="#cccccc" loext:opacity="100%" style:font-name="Consolas" fo:font-size="10pt" style:font-size-asian="10pt" style:font-size-complex="7pt"/>
    </style:style>
    <style:style style:name="T29" style:family="text">
      <style:text-properties fo:color="#b19b9b" loext:opacity="100%" style:font-name="Consolas" fo:font-size="10pt" style:text-underline-style="none" style:font-size-asian="10pt" style:font-size-complex="7pt"/>
    </style:style>
    <style:style style:name="T30" style:family="text">
      <style:text-properties fo:color="#c0c0c0" loext:opacity="100%" style:font-name="Consolas" fo:font-size="10pt" style:font-size-asian="10pt" style:font-size-complex="7pt"/>
    </style:style>
    <style:style style:name="T31" style:family="text">
      <style:text-properties fo:color="#c0c0c0" loext:opacity="100%" style:font-name="Consolas" fo:font-size="10pt" officeooo:rsid="016f71e5" style:font-size-asian="10pt" style:font-size-complex="7pt"/>
    </style:style>
    <style:style style:name="T32" style:family="text">
      <style:text-properties fo:color="#eecc64" loext:opacity="100%" style:font-name="Consolas" fo:font-size="10pt" style:font-size-asian="10pt" style:font-size-complex="7pt"/>
    </style:style>
    <style:style style:name="T33" style:family="text">
      <style:text-properties officeooo:rsid="01576de4"/>
    </style:style>
    <style:style style:name="T34" style:family="text">
      <style:text-properties style:font-name="Comic Sans MS" officeooo:rsid="01576de4"/>
    </style:style>
    <style:style style:name="T35" style:family="text">
      <style:text-properties fo:color="#669768" loext:opacity="100%" style:font-name="Consolas" fo:font-size="10pt" officeooo:rsid="016b670b" style:font-size-asian="10pt"/>
    </style:style>
    <style:style style:name="T36" style:family="text">
      <style:text-properties officeooo:rsid="0158a320"/>
    </style:style>
    <style:style style:name="T37" style:family="text">
      <style:text-properties style:font-name="Comic Sans MS" officeooo:rsid="0158a320"/>
    </style:style>
    <style:style style:name="T38" style:family="text">
      <style:text-properties fo:color="#cccccc" loext:opacity="100%" style:font-name="Consolas" fo:font-size="10pt" officeooo:rsid="016c8420" style:font-size-asian="10pt"/>
    </style:style>
    <style:style style:name="T39" style:family="text">
      <style:text-properties fo:color="#b19b9b" loext:opacity="100%" style:font-name="Consolas" fo:font-size="10pt" style:text-underline-style="solid" style:text-underline-width="auto" style:text-underline-color="font-color" style:font-size-asian="10pt"/>
    </style:style>
    <style:style style:name="T40" style:family="text">
      <style:text-properties officeooo:rsid="0159a71d"/>
    </style:style>
    <style:style style:name="T41" style:family="text">
      <style:text-properties style:font-name="Comic Sans MS" officeooo:rsid="0159a71d"/>
    </style:style>
    <style:style style:name="T42" style:family="text">
      <style:text-properties fo:color="#cccccc" loext:opacity="100%" style:font-name="Consolas" fo:font-size="10pt" officeooo:rsid="016d2357" style:font-size-asian="10pt"/>
    </style:style>
    <style:style style:name="T43" style:family="text">
      <style:text-properties fo:color="#669768" loext:opacity="100%" style:font-name="Consolas" fo:font-size="10pt" officeooo:rsid="016d2357" style:font-size-asian="10pt"/>
    </style:style>
    <style:style style:name="T44" style:family="text">
      <style:text-properties fo:color="#b19b9b" loext:opacity="100%" style:font-name="Consolas" fo:font-size="10pt" fo:font-style="normal" style:text-underline-style="none" style:font-size-asian="10pt" style:font-style-asian="normal" style:font-style-complex="normal"/>
    </style:style>
    <style:style style:name="T45" style:family="text">
      <style:text-properties officeooo:rsid="015cf0cd"/>
    </style:style>
    <style:style style:name="T46" style:family="text">
      <style:text-properties style:font-name="Comic Sans MS" officeooo:rsid="015cf0cd"/>
    </style:style>
    <style:style style:name="T47" style:family="text">
      <style:text-properties fo:color="#739eca" loext:opacity="100%" style:font-name="Consolas" fo:font-size="10pt" style:text-underline-style="none" fo:font-weight="bold" style:font-size-asian="10pt" style:font-weight-asian="bold"/>
    </style:style>
    <style:style style:name="T48" style:family="text">
      <style:text-properties fo:color="#cac580" loext:opacity="100%" style:font-name="Consolas" fo:font-size="10pt" style:font-size-asian="10pt"/>
    </style:style>
    <style:style style:name="T49" style:family="text">
      <style:text-properties fo:color="#669768" loext:opacity="100%"/>
    </style:style>
    <style:style style:name="T50" style:family="text">
      <style:text-properties style:font-name="Comic Sans MS"/>
    </style:style>
    <style:style style:name="T51" style:family="text">
      <style:text-properties style:font-name="Comic Sans MS" fo:font-size="7pt" style:font-size-asian="7pt" style:font-size-complex="7pt"/>
    </style:style>
    <style:style style:name="T52" style:family="text">
      <style:text-properties fo:font-variant="normal" fo:text-transform="none" fo:color="#000000" loext:opacity="100%" fo:letter-spacing="normal" fo:font-style="normal" fo:font-weight="normal" officeooo:rsid="01087846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parallel" style:number-wrapped-paragraphs="no-limit" style:wrap-contour="fals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.</text:p>
      <text:p text:style-name="P2">Sobre la base de datos PorciTEIS realiza las siguientes Vistas, Funciones, Procedimientos, Triggers asociados:</text:p>
      <text:list text:style-name="L1">
        <text:list-item>
          <text:p text:style-name="P3">Vistas:</text:p>
          <text:list>
            <text:list-item>
              <text:p text:style-name="P4">Crea una vista <text:span text:style-name="T1">llamada </text:span><text:span text:style-name="T2">Vista_Eventos_Resumen</text:span><text:span text:style-name="T3"> </text:span>que muestre los eventos junto con el número total de porcinos participantes en cada uno, incluyendo el identificador del evento, tipo y total de participantes. </text:p>
            </text:list-item>
          </text:list>
        </text:list-item>
      </text:list>
      <table:table table:name="Táboa1" table:style-name="Táboa1">
        <table:table-column table:style-name="Táboa1.A"/>
        <table:table-row>
          <table:table-cell table:style-name="Táboa1.A1" office:value-type="string">
            <text:p text:style-name="P5" loext:marker-style-name="T4"><text:span text:style-name="T5">CREATE</text:span><text:span text:style-name="T6"> </text:span><text:span text:style-name="T5">OR</text:span><text:span text:style-name="T6"> </text:span><text:span text:style-name="T5">REPLACE</text:span><text:span text:style-name="T6"> </text:span><text:span text:style-name="T7">VIEW</text:span><text:span text:style-name="T6"> </text:span><text:span text:style-name="T8">Vista_Eventos_Resumen</text:span><text:span text:style-name="T6"> </text:span><text:span text:style-name="T5">AS</text:span></text:p>
            <text:p text:style-name="P5" loext:marker-style-name="T4"><text:span text:style-name="T5">SELECT</text:span><text:span text:style-name="T6"> </text:span></text:p>
            <text:p text:style-name="P5" loext:marker-style-name="T4"><text:span text:style-name="T6"><text:tab/></text:span><text:span text:style-name="T9">pe</text:span><text:span text:style-name="T6">.</text:span><text:span text:style-name="T9">idEvento</text:span><text:span text:style-name="T6">, </text:span></text:p>
            <text:p text:style-name="P5" loext:marker-style-name="T4"><text:span text:style-name="T6"><text:tab/></text:span><text:span text:style-name="T8">pe</text:span><text:span text:style-name="T6">.</text:span><text:span text:style-name="T9">tipoEvento</text:span><text:span text:style-name="T6">,</text:span></text:p>
            <text:p text:style-name="P5" loext:marker-style-name="T4"><text:span text:style-name="T6"><text:tab/></text:span><text:span text:style-name="T8">COUNT</text:span><text:span text:style-name="T6">(</text:span><text:span text:style-name="T9">pec</text:span><text:span text:style-name="T6">.</text:span><text:span text:style-name="T9">idPorcino</text:span><text:span text:style-name="T6">) </text:span><text:span text:style-name="T5">AS</text:span><text:span text:style-name="T6"> </text:span><text:span text:style-name="T9">totalParticipantes</text:span></text:p>
            <text:p text:style-name="P5" loext:marker-style-name="T4"><text:span text:style-name="T5">FROM</text:span><text:span text:style-name="T6"> </text:span><text:span text:style-name="T9">PorciEvento</text:span><text:span text:style-name="T6"> </text:span><text:span text:style-name="T9">pe</text:span></text:p>
            <text:p text:style-name="P5" loext:marker-style-name="T4"><text:span text:style-name="T5">JOIN</text:span><text:span text:style-name="T6"> </text:span><text:span text:style-name="T9">PorciEvento_Cercado</text:span><text:span text:style-name="T6"> </text:span><text:span text:style-name="T9">pec</text:span><text:span text:style-name="T6"> </text:span><text:span text:style-name="T5">ON</text:span><text:span text:style-name="T6"> </text:span><text:span text:style-name="T9">pe</text:span><text:span text:style-name="T6">.</text:span><text:span text:style-name="T9">idEvento</text:span><text:span text:style-name="T6"> = </text:span><text:span text:style-name="T9">pec</text:span><text:span text:style-name="T6">.</text:span><text:span text:style-name="T9">idEvento</text:span></text:p>
            <text:p text:style-name="P5" loext:marker-style-name="T4"><text:span text:style-name="T5">GROUP</text:span><text:span text:style-name="T6"> </text:span><text:span text:style-name="T5">BY</text:span><text:span text:style-name="T6"> </text:span><text:span text:style-name="T9">pe</text:span><text:span text:style-name="T6">.</text:span><text:span text:style-name="T9">idEvento</text:span><text:span text:style-name="T6">, </text:span><text:span text:style-name="T9">pe</text:span><text:span text:style-name="T6">.</text:span><text:span text:style-name="T9">tipoEvento</text:span><text:span text:style-name="T10">;</text:span></text:p>
            <text:p text:style-name="P5" loext:marker-style-name="T4"><text:span text:style-name="T6"><text:tab/></text:span><text:span text:style-name="T6"/></text:p>
            <text:p text:style-name="P6"><text:span text:style-name="T5">SELECT</text:span><text:span text:style-name="T6"> * </text:span><text:span text:style-name="T5">FROM</text:span><text:span text:style-name="T6"> </text:span><text:span text:style-name="T7">Vista_Eventos_Resumen</text:span><text:span text:style-name="T10">;</text:span></text:p>
          </table:table-cell>
        </table:table-row>
      </table:table>
      <text:p text:style-name="P7"/>
      <text:p text:style-name="P7"><draw:frame draw:style-name="fr1" draw:name="Imagen1" text:anchor-type="char" svg:x="3.528cm" svg:y="-0.131cm" svg:width="10.172cm" svg:height="13.737cm" draw:z-index="0"><draw:image xlink:href="Pictures/10000001000001E800000293D781DC92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text:continue-numbering="true" text:style-name="L1">
        <text:list-item>
          <text:list>
            <text:list-item>
              <text:p text:style-name="P8"><text:soft-page-break/>Crea una vista <text:span text:style-name="T11">llamada </text:span><text:span text:style-name="T12">Vista_Porcinos_Intensidad</text:span><text:span text:style-name="T11"> </text:span>que muestre los porcinos junto con la intensidad media de sus participaciones, incluyendo el identificador del porcino y la media de intensidad.</text:p>
            </text:list-item>
          </text:list>
        </text:list-item>
      </text:list>
      <table:table table:name="Táboa2" table:style-name="Táboa2">
        <table:table-column table:style-name="Táboa2.A"/>
        <table:table-row>
          <table:table-cell table:style-name="Táboa2.A1" office:value-type="string">
            <text:p text:style-name="P5" loext:marker-style-name="T4"><text:span text:style-name="T5">CREATE</text:span><text:span text:style-name="T6"> </text:span><text:span text:style-name="T5">OR</text:span><text:span text:style-name="T6"> </text:span><text:span text:style-name="T5">REPLACE</text:span><text:span text:style-name="T6"> </text:span><text:span text:style-name="T7">VIEW</text:span><text:span text:style-name="T6"> </text:span><text:span text:style-name="T8">Vista_Porcinos_Intensidad</text:span><text:span text:style-name="T6"> </text:span><text:span text:style-name="T5">AS</text:span></text:p>
            <text:p text:style-name="P5" loext:marker-style-name="T4"><text:span text:style-name="T5">SELECT</text:span><text:span text:style-name="T5"/></text:p>
            <text:p text:style-name="P5" loext:marker-style-name="T4"><text:span text:style-name="T6"><text:tab/></text:span><text:span text:style-name="T9">p</text:span><text:span text:style-name="T6">.</text:span><text:span text:style-name="T9">idPorcino</text:span><text:span text:style-name="T6">,</text:span></text:p>
            <text:p text:style-name="P5" loext:marker-style-name="T4"><text:span text:style-name="T6"><text:tab/></text:span><text:span text:style-name="T8">ROUND</text:span><text:span text:style-name="T6">(</text:span><text:span text:style-name="T13">AVG</text:span><text:span text:style-name="T6">(</text:span><text:span text:style-name="T14">pec</text:span><text:span text:style-name="T15">.</text:span><text:span text:style-name="T16">intensidad</text:span><text:span text:style-name="T6">), </text:span><text:span text:style-name="T17">2</text:span><text:span text:style-name="T6">) </text:span><text:span text:style-name="T5">AS</text:span><text:span text:style-name="T6"> </text:span><text:span text:style-name="T9">mediaDeIntensidad</text:span></text:p>
            <text:p text:style-name="P5" loext:marker-style-name="T4"><text:span text:style-name="T5">FROM</text:span><text:span text:style-name="T6"> </text:span><text:span text:style-name="T9">Porcino</text:span><text:span text:style-name="T6"> </text:span><text:span text:style-name="T9">p</text:span></text:p>
            <text:p text:style-name="P5" loext:marker-style-name="T4"><text:span text:style-name="T5">JOIN</text:span><text:span text:style-name="T6"> </text:span><text:span text:style-name="T9">PorciEvento_Cercado</text:span><text:span text:style-name="T6"> </text:span><text:span text:style-name="T9">pec</text:span><text:span text:style-name="T6"> </text:span><text:span text:style-name="T5">ON</text:span><text:span text:style-name="T6"> </text:span><text:span text:style-name="T9">p</text:span><text:span text:style-name="T6">.</text:span><text:span text:style-name="T9">idPorcino</text:span><text:span text:style-name="T6"> = </text:span><text:span text:style-name="T9">pec</text:span><text:span text:style-name="T6">.</text:span><text:span text:style-name="T9">idPorcino</text:span></text:p>
            <text:p text:style-name="P5" loext:marker-style-name="T4"><text:span text:style-name="T5">GROUP</text:span><text:span text:style-name="T6"> </text:span><text:span text:style-name="T5">BY</text:span><text:span text:style-name="T6"> </text:span><text:span text:style-name="T9">p</text:span><text:span text:style-name="T6">.</text:span><text:span text:style-name="T9">idPorcino</text:span><text:span text:style-name="T10">;</text:span></text:p>
            <text:p text:style-name="P5" loext:marker-style-name="T4"><text:span text:style-name="T6"><text:tab/></text:span><text:span text:style-name="T6"/></text:p>
            <text:p text:style-name="P9"><text:span text:style-name="T5">SELECT</text:span><text:span text:style-name="T6"> * </text:span><text:span text:style-name="T5">FROM</text:span><text:span text:style-name="T6"> </text:span><text:span text:style-name="T7">Vista_Porcinos_Intensidad</text:span><text:span text:style-name="T10">;</text:span></text:p>
          </table:table-cell>
        </table:table-row>
      </table:table>
      <text:p text:style-name="P10"/>
      <text:p text:style-name="P10"><draw:frame draw:style-name="fr1" draw:name="Imagen2" text:anchor-type="char" svg:x="3.288cm" svg:y="0.402cm" svg:width="11.254cm" svg:height="15.859cm" draw:z-index="1"><draw:image xlink:href="Pictures/10000001000001F0000002BB48A24C59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text:continue-numbering="true" text:style-name="L1">
        <text:list-item>
          <text:p text:style-name="P11"><text:soft-page-break/><text:span text:style-name="T18">Funciones:</text:span></text:p>
          <text:list>
            <text:list-item>
              <text:p text:style-name="P12">Crea una función <text:span text:style-name="T19">llamada </text:span><text:span text:style-name="T20">obtener_intensidad_media_evento</text:span><text:span text:style-name="T19"> </text:span>que reciba el identificador de un evento y devuelva la intensidad media de los porcinos que participaron en dicho evento. </text:p>
            </text:list-item>
          </text:list>
        </text:list-item>
      </text:list>
      <table:table table:name="Táboa3" table:style-name="Táboa3">
        <table:table-column table:style-name="Táboa3.A"/>
        <table:table-row>
          <table:table-cell table:style-name="Táboa3.A1" office:value-type="string">
            <text:p text:style-name="P5" loext:marker-style-name="T4"><text:span text:style-name="T21">#Borro la función por si ya existe:<text:tab/></text:span><text:span text:style-name="T21"/></text:p>
            <text:p text:style-name="P5" loext:marker-style-name="T4"><text:span text:style-name="T6"><text:tab/></text:span><text:span text:style-name="T6"/></text:p>
            <text:p text:style-name="P5" loext:marker-style-name="T4"><text:span text:style-name="T5">DROP</text:span><text:span text:style-name="T6"> </text:span><text:span text:style-name="T5">FUNCTION</text:span><text:span text:style-name="T6"> </text:span><text:span text:style-name="T5">IF</text:span><text:span text:style-name="T6"> </text:span><text:span text:style-name="T5">EXISTS</text:span><text:span text:style-name="T6"> </text:span><text:span text:style-name="T9">obtener_intensidad_media_evento</text:span><text:span text:style-name="T10">;</text:span></text:p>
            <text:p text:style-name="P13" loext:marker-style-name="T4"/>
            <text:p text:style-name="P5" loext:marker-style-name="T4"><text:span text:style-name="T21">#Abro el delimitador para el código de la función</text:span><text:span text:style-name="T21"/></text:p>
            <text:p text:style-name="P13" loext:marker-style-name="T4"/>
            <text:p text:style-name="P5" loext:marker-style-name="T4"><text:span text:style-name="T22">DELIMITER</text:span><text:span text:style-name="T9"> //</text:span></text:p>
            <text:p text:style-name="P5" loext:marker-style-name="T4"><text:span text:style-name="T6"><text:tab/></text:span><text:span text:style-name="T6"/></text:p>
            <text:p text:style-name="P5" loext:marker-style-name="T4"><text:span text:style-name="T5">CREATE</text:span><text:span text:style-name="T6"> </text:span><text:span text:style-name="T5">FUNCTION</text:span><text:span text:style-name="T6"> </text:span><text:span text:style-name="T9">obtener_intensidad_media_evento</text:span><text:span text:style-name="T6">(</text:span><text:span text:style-name="T9">p_idEvento</text:span><text:span text:style-name="T6"> </text:span><text:span text:style-name="T13">INT</text:span><text:span text:style-name="T6">)</text:span></text:p>
            <text:p text:style-name="P5" loext:marker-style-name="T4"><text:span text:style-name="T5">RETURNS</text:span><text:span text:style-name="T6"> </text:span><text:span text:style-name="T13">DECIMAL</text:span><text:span text:style-name="T6">(</text:span><text:span text:style-name="T17">5</text:span><text:span text:style-name="T6">,</text:span><text:span text:style-name="T17">2</text:span><text:span text:style-name="T6">)</text:span></text:p>
            <text:p text:style-name="P5" loext:marker-style-name="T4"><text:span text:style-name="T5">READS</text:span><text:span text:style-name="T6"> </text:span><text:span text:style-name="T5">SQL</text:span><text:span text:style-name="T6"> </text:span><text:span text:style-name="T5">DATA</text:span><text:span text:style-name="T6"> </text:span><text:span text:style-name="T21">#Etiqueta recomendada cuando la función hace consultas.</text:span></text:p>
            <text:p text:style-name="P5" loext:marker-style-name="T4"><text:span text:style-name="T21">#DETERMINISTIC (Si la función fuese independiente de los datos alamacenados)</text:span><text:span text:style-name="T21"/></text:p>
            <text:p text:style-name="P5" loext:marker-style-name="T4"><text:span text:style-name="T5">BEGIN</text:span><text:span text:style-name="T5"/></text:p>
            <text:p text:style-name="P5" loext:marker-style-name="T4"><text:span text:style-name="T6"><text:tab/></text:span><text:span text:style-name="T21">#Se declara la variable para guardar el resultado</text:span></text:p>
            <text:p text:style-name="P5" loext:marker-style-name="T4"><text:span text:style-name="T6"><text:tab/></text:span><text:span text:style-name="T5">DECLARE</text:span><text:span text:style-name="T6"> </text:span><text:span text:style-name="T9">resultado</text:span><text:span text:style-name="T6"> </text:span><text:span text:style-name="T13">DECIMAL</text:span><text:span text:style-name="T6">(</text:span><text:span text:style-name="T17">5</text:span><text:span text:style-name="T6">,</text:span><text:span text:style-name="T17">2</text:span><text:span text:style-name="T6">)</text:span><text:span text:style-name="T10">;</text:span></text:p>
            <text:p text:style-name="P5" loext:marker-style-name="T4"><text:span text:style-name="T6"><text:tab/></text:span><text:span text:style-name="T6"/></text:p>
            <text:p text:style-name="P5" loext:marker-style-name="T4"><text:span text:style-name="T6"><text:tab/></text:span><text:span text:style-name="T21">#Se hace la consulta y se guarda el valor redondeado en la variable "resultado"</text:span></text:p>
            <text:p text:style-name="P5" loext:marker-style-name="T4"><text:span text:style-name="T6"><text:tab/></text:span><text:span text:style-name="T5">SELECT</text:span><text:span text:style-name="T6"> </text:span><text:span text:style-name="T13">ROUND</text:span><text:span text:style-name="T6">(</text:span><text:span text:style-name="T13">AVG</text:span><text:span text:style-name="T6">(</text:span><text:span text:style-name="T8">intensidad</text:span><text:span text:style-name="T6">), </text:span><text:span text:style-name="T17">2</text:span><text:span text:style-name="T6">) </text:span><text:span text:style-name="T5">INTO</text:span><text:span text:style-name="T6"> </text:span><text:span text:style-name="T16">resultado</text:span></text:p>
            <text:p text:style-name="P5" loext:marker-style-name="T4"><text:span text:style-name="T6"><text:tab/></text:span><text:span text:style-name="T5">FROM</text:span><text:span text:style-name="T6"> </text:span><text:span text:style-name="T7">PorciEvento_Cercado</text:span><text:span text:style-name="T6"> </text:span><text:span text:style-name="T23">pec</text:span></text:p>
            <text:p text:style-name="P5" loext:marker-style-name="T4"><text:span text:style-name="T6"><text:tab/></text:span><text:span text:style-name="T5">WHERE</text:span><text:span text:style-name="T6"> </text:span><text:span text:style-name="T23">pec</text:span><text:span text:style-name="T6">.</text:span><text:span text:style-name="T8">idEvento</text:span><text:span text:style-name="T6"> = </text:span><text:span text:style-name="T16">p_idEvento</text:span><text:span text:style-name="T10">;</text:span></text:p>
            <text:p text:style-name="P5" loext:marker-style-name="T4"><text:span text:style-name="T6"><text:tab/></text:span><text:span text:style-name="T6"/></text:p>
            <text:p text:style-name="P5" loext:marker-style-name="T4"><text:span text:style-name="T6"><text:tab/></text:span><text:span text:style-name="T21">#Se devuelve el resultado</text:span></text:p>
            <text:p text:style-name="P5" loext:marker-style-name="T4"><text:span text:style-name="T6"><text:tab/></text:span><text:span text:style-name="T5">RETURN</text:span><text:span text:style-name="T6"> </text:span><text:span text:style-name="T9">resultado</text:span><text:span text:style-name="T10">;</text:span></text:p>
            <text:p text:style-name="P5" loext:marker-style-name="T4"><text:span text:style-name="T5">END</text:span><text:span text:style-name="T5"/></text:p>
            <text:p text:style-name="P5" loext:marker-style-name="T4"><text:span text:style-name="T6"><text:tab/><text:tab/></text:span><text:span text:style-name="T6"/></text:p>
            <text:p text:style-name="P5" loext:marker-style-name="T4"><text:span text:style-name="T22">DELIMITER</text:span><text:span text:style-name="T9"> ;</text:span></text:p>
            <text:p text:style-name="P13" loext:marker-style-name="T4"/>
            <text:p text:style-name="P5" loext:marker-style-name="T4"><text:span text:style-name="T21">#Visualizamos el resultado para los eventos 1, 5, 13, 21 y 30</text:span><text:span text:style-name="T21"/></text:p>
            <text:p text:style-name="P5" loext:marker-style-name="T4"><text:span text:style-name="T5">SELECT</text:span><text:span text:style-name="T6"> </text:span><text:span text:style-name="T13">obtener_intensidad_media_evento</text:span><text:span text:style-name="T6">(</text:span><text:span text:style-name="T17">1</text:span><text:span text:style-name="T6">)</text:span><text:span text:style-name="T10">;</text:span></text:p>
            <text:p text:style-name="P5" loext:marker-style-name="T4"><text:span text:style-name="T5">SELECT</text:span><text:span text:style-name="T6"> </text:span><text:span text:style-name="T13">obtener_intensidad_media_evento</text:span><text:span text:style-name="T6">(</text:span><text:span text:style-name="T17">5</text:span><text:span text:style-name="T6">)</text:span><text:span text:style-name="T10">;</text:span></text:p>
            <text:p text:style-name="P5" loext:marker-style-name="T4"><text:span text:style-name="T5">SELECT</text:span><text:span text:style-name="T6"> </text:span><text:span text:style-name="T13">obtener_intensidad_media_evento</text:span><text:span text:style-name="T6">(</text:span><text:span text:style-name="T17">13</text:span><text:span text:style-name="T6">)</text:span><text:span text:style-name="T10">;</text:span></text:p>
            <text:p text:style-name="P5" loext:marker-style-name="T4"><text:span text:style-name="T5">SELECT</text:span><text:span text:style-name="T6"> </text:span><text:span text:style-name="T13">obtener_intensidad_media_evento</text:span><text:span text:style-name="T6">(</text:span><text:span text:style-name="T17">21</text:span><text:span text:style-name="T6">)</text:span><text:span text:style-name="T10">;</text:span></text:p>
            <text:p text:style-name="P14"><text:span text:style-name="T5">SELECT</text:span><text:span text:style-name="T6"> </text:span><text:span text:style-name="T13">obtener_intensidad_media_evento</text:span><text:span text:style-name="T6">(</text:span><text:span text:style-name="T17">30</text:span><text:span text:style-name="T6">)</text:span><text:span text:style-name="T10">;</text:span></text:p>
          </table:table-cell>
        </table:table-row>
      </table:table>
      <text:p text:style-name="P15"><draw:frame draw:style-name="fr1" draw:name="Imagen3" text:anchor-type="char" svg:x="0.425cm" svg:y="0.37cm" svg:width="8.096cm" svg:height="2.54cm" draw:z-index="2"><draw:image xlink:href="Pictures/100000010000013200000060EE42D2AD.png" xlink:type="simple" xlink:show="embed" xlink:actuate="onLoad" draw:mime-type="image/png"/></draw:frame><draw:frame draw:style-name="fr1" draw:name="Imagen5" text:anchor-type="char" svg:x="8.654cm" svg:y="0.318cm" svg:width="8.44cm" svg:height="2.699cm" draw:z-index="4"><draw:image xlink:href="Pictures/100000010000013F000000661C5C71AA.png" xlink:type="simple" xlink:show="embed" xlink:actuate="onLoad" draw:mime-type="image/png"/></draw:frame></text:p>
      <text:p text:style-name="P15"/>
      <text:p text:style-name="P15"/>
      <text:p text:style-name="P15"/>
      <text:p text:style-name="P15"><draw:frame draw:style-name="fr1" draw:name="Imagen4" text:anchor-type="char" svg:x="0.584cm" svg:y="0.026cm" svg:width="7.99cm" svg:height="2.514cm" draw:z-index="3"><draw:image xlink:href="Pictures/100000010000012E0000005F373E555C.png" xlink:type="simple" xlink:show="embed" xlink:actuate="onLoad" draw:mime-type="image/png"/></draw:frame><draw:frame draw:style-name="fr1" draw:name="Imagen6" text:anchor-type="char" svg:x="8.839cm" svg:y="0.026cm" svg:width="8.204cm" svg:height="2.566cm" draw:z-index="5"><draw:image xlink:href="Pictures/1000000100000136000000619299AB4A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list text:continue-numbering="true" text:style-name="L1">
        <text:list-item>
          <text:list>
            <text:list-item>
              <text:p text:style-name="P12"><text:soft-page-break/>Crea una función <text:span text:style-name="T19">llamada </text:span><text:span text:style-name="T20">obtener_ultima_fecha_porcino</text:span><text:span text:style-name="T24"> </text:span>que reciba el identificador de un porcino y devuelva la fecha del último evento en el que ha participado. </text:p>
            </text:list-item>
          </text:list>
        </text:list-item>
      </text:list>
      <table:table table:name="Táboa4" table:style-name="Táboa4">
        <table:table-column table:style-name="Táboa4.A"/>
        <table:table-row>
          <table:table-cell table:style-name="Táboa4.A1" office:value-type="string">
            <text:p text:style-name="P5" loext:marker-style-name="T4"><text:span text:style-name="T21">#Borro la función por si ya existe:<text:tab/></text:span></text:p>
            <text:p text:style-name="P5" loext:marker-style-name="T4"><text:span text:style-name="T6"><text:tab/></text:span><text:span text:style-name="T6"/></text:p>
            <text:p text:style-name="P5" loext:marker-style-name="T4"><text:span text:style-name="T5">DROP</text:span><text:span text:style-name="T6"> </text:span><text:span text:style-name="T5">FUNCTION</text:span><text:span text:style-name="T6"> </text:span><text:span text:style-name="T5">IF</text:span><text:span text:style-name="T6"> </text:span><text:span text:style-name="T5">EXISTS</text:span><text:span text:style-name="T6"> </text:span><text:span text:style-name="T9">obtener_ultima_fecha_porcino</text:span><text:span text:style-name="T10">;</text:span></text:p>
            <text:p text:style-name="P13" loext:marker-style-name="T4"/>
            <text:p text:style-name="P5" loext:marker-style-name="T4"><text:span text:style-name="T21">#Abro el delimitador para el código de la función</text:span><text:span text:style-name="T21"/></text:p>
            <text:p text:style-name="P13" loext:marker-style-name="T4"/>
            <text:p text:style-name="P5" loext:marker-style-name="T4"><text:span text:style-name="T22">DELIMITER</text:span><text:span text:style-name="T9"> //</text:span></text:p>
            <text:p text:style-name="P5" loext:marker-style-name="T4"><text:span text:style-name="T6"><text:tab/></text:span><text:span text:style-name="T6"/></text:p>
            <text:p text:style-name="P5" loext:marker-style-name="T4"><text:span text:style-name="T5">CREATE</text:span><text:span text:style-name="T6"> </text:span><text:span text:style-name="T5">FUNCTION</text:span><text:span text:style-name="T6"> </text:span><text:span text:style-name="T9">obtener_ultima_fecha_porcino</text:span><text:span text:style-name="T6">(</text:span><text:span text:style-name="T9">p_idPorcino</text:span><text:span text:style-name="T6"> </text:span><text:span text:style-name="T13">INT</text:span><text:span text:style-name="T6">)</text:span></text:p>
            <text:p text:style-name="P5" loext:marker-style-name="T4"><text:span text:style-name="T5">RETURNS</text:span><text:span text:style-name="T6"> </text:span><text:span text:style-name="T13">DATE</text:span></text:p>
            <text:p text:style-name="P5" loext:marker-style-name="T4"><text:span text:style-name="T5">READS</text:span><text:span text:style-name="T6"> </text:span><text:span text:style-name="T5">SQL</text:span><text:span text:style-name="T6"> </text:span><text:span text:style-name="T5">DATA</text:span><text:span text:style-name="T6"> </text:span><text:span text:style-name="T21">#Etiqueta recomendada cuando la función hace consultas.</text:span></text:p>
            <text:p text:style-name="P5" loext:marker-style-name="T4"><text:span text:style-name="T21">#DETERMINISTIC (Si la función fuese independiente de los datos alamacenados)</text:span><text:span text:style-name="T21"/></text:p>
            <text:p text:style-name="P5" loext:marker-style-name="T4"><text:span text:style-name="T5">BEGIN</text:span><text:span text:style-name="T5"/></text:p>
            <text:p text:style-name="P5" loext:marker-style-name="T4"><text:span text:style-name="T6"><text:tab/></text:span><text:span text:style-name="T21">#Se declara la variable para guardar el resultado</text:span></text:p>
            <text:p text:style-name="P5" loext:marker-style-name="T4"><text:span text:style-name="T6"><text:tab/></text:span><text:span text:style-name="T5">DECLARE</text:span><text:span text:style-name="T6"> </text:span><text:span text:style-name="T9">resultado</text:span><text:span text:style-name="T6"> </text:span><text:span text:style-name="T13">DATE</text:span><text:span text:style-name="T10">;</text:span></text:p>
            <text:p text:style-name="P5" loext:marker-style-name="T4"><text:span text:style-name="T6"><text:tab/></text:span><text:span text:style-name="T6"/></text:p>
            <text:p text:style-name="P5" loext:marker-style-name="T4"><text:span text:style-name="T6"><text:tab/></text:span><text:span text:style-name="T21">#Se hace la consulta y se guarda la fecha en la variable "resultado"</text:span></text:p>
            <text:p text:style-name="P5" loext:marker-style-name="T4"><text:span text:style-name="T6"><text:tab/></text:span><text:span text:style-name="T5">SELECT</text:span><text:span text:style-name="T6"> <text:s/></text:span><text:span text:style-name="T13">MAX</text:span><text:span text:style-name="T6">(</text:span><text:span text:style-name="T23">pec</text:span><text:span text:style-name="T6">.</text:span><text:span text:style-name="T8">fechaRegistro</text:span><text:span text:style-name="T6">) </text:span><text:span text:style-name="T5">INTO</text:span><text:span text:style-name="T6"> </text:span><text:span text:style-name="T16">resultado</text:span></text:p>
            <text:p text:style-name="P5" loext:marker-style-name="T4"><text:span text:style-name="T6"><text:tab/></text:span><text:span text:style-name="T5">FROM</text:span><text:span text:style-name="T6"> </text:span><text:span text:style-name="T7">PorciEvento_Cercado</text:span><text:span text:style-name="T6"> </text:span><text:span text:style-name="T23">pec</text:span></text:p>
            <text:p text:style-name="P5" loext:marker-style-name="T4"><text:span text:style-name="T6"><text:tab/></text:span><text:span text:style-name="T5">WHERE</text:span><text:span text:style-name="T6"> </text:span><text:span text:style-name="T23">pec</text:span><text:span text:style-name="T6">.</text:span><text:span text:style-name="T8">idPorcino</text:span><text:span text:style-name="T6"> =</text:span><text:span text:style-name="T15"> </text:span><text:span text:style-name="T16">p_idPorcino</text:span><text:span text:style-name="T10">;</text:span></text:p>
            <text:p text:style-name="P5" loext:marker-style-name="T4"><text:span text:style-name="T6"><text:tab/></text:span><text:span text:style-name="T6"/></text:p>
            <text:p text:style-name="P5" loext:marker-style-name="T4"><text:span text:style-name="T6"><text:tab/></text:span><text:span text:style-name="T21">#Se devuelve el resultado</text:span></text:p>
            <text:p text:style-name="P5" loext:marker-style-name="T4"><text:span text:style-name="T6"><text:tab/></text:span><text:span text:style-name="T5">RETURN</text:span><text:span text:style-name="T6"> </text:span><text:span text:style-name="T9">resultado</text:span><text:span text:style-name="T10">;</text:span></text:p>
            <text:p text:style-name="P5" loext:marker-style-name="T4"><text:span text:style-name="T5">END</text:span><text:span text:style-name="T5"/></text:p>
            <text:p text:style-name="P5" loext:marker-style-name="T4"><text:span text:style-name="T6"><text:tab/><text:tab/></text:span><text:span text:style-name="T6"/></text:p>
            <text:p text:style-name="P5" loext:marker-style-name="T4"><text:span text:style-name="T22">DELIMITER</text:span><text:span text:style-name="T9"> ;</text:span></text:p>
            <text:p text:style-name="P13" loext:marker-style-name="T4"/>
            <text:p text:style-name="P5" loext:marker-style-name="T4"><text:span text:style-name="T21">#Visualizamos el resultado para los porcinos 1, 25, 69, 121 y 199</text:span><text:span text:style-name="T21"/></text:p>
            <text:p text:style-name="P5" loext:marker-style-name="T4"><text:span text:style-name="T5">SELECT</text:span><text:span text:style-name="T6"> </text:span><text:span text:style-name="T13">obtener_ultima_fecha_porcino</text:span><text:span text:style-name="T6">(</text:span><text:span text:style-name="T17">1</text:span><text:span text:style-name="T6">)</text:span><text:span text:style-name="T10">;</text:span></text:p>
            <text:p text:style-name="P5" loext:marker-style-name="T4"><text:span text:style-name="T5">SELECT</text:span><text:span text:style-name="T6"> </text:span><text:span text:style-name="T13">obtener_ultima_fecha_porcino</text:span><text:span text:style-name="T6">(</text:span><text:span text:style-name="T17">25</text:span><text:span text:style-name="T6">)</text:span><text:span text:style-name="T10">;</text:span><text:span text:style-name="T6"><text:tab/></text:span></text:p>
            <text:p text:style-name="P5" loext:marker-style-name="T4"><text:span text:style-name="T5">SELECT</text:span><text:span text:style-name="T6"> </text:span><text:span text:style-name="T13">obtener_ultima_fecha_porcino</text:span><text:span text:style-name="T6">(</text:span><text:span text:style-name="T17">69</text:span><text:span text:style-name="T6">)</text:span><text:span text:style-name="T10">;</text:span></text:p>
            <text:p text:style-name="P5" loext:marker-style-name="T4"><text:span text:style-name="T5">SELECT</text:span><text:span text:style-name="T6"> </text:span><text:span text:style-name="T13">obtener_ultima_fecha_porcino</text:span><text:span text:style-name="T6">(</text:span><text:span text:style-name="T17">121</text:span><text:span text:style-name="T6">)</text:span><text:span text:style-name="T10">;</text:span></text:p>
            <text:p text:style-name="P14"><text:span text:style-name="T5">SELECT</text:span><text:span text:style-name="T6"> </text:span><text:span text:style-name="T13">obtener_ultima_fecha_porcino</text:span><text:span text:style-name="T6">(</text:span><text:span text:style-name="T17">199</text:span><text:span text:style-name="T6">)</text:span><text:span text:style-name="T10">;</text:span></text:p>
          </table:table-cell>
        </table:table-row>
      </table:table>
      <text:p text:style-name="P15"/>
      <text:p text:style-name="P16"><draw:frame draw:style-name="fr1" draw:name="Imagen7" text:anchor-type="char" svg:x="0.531cm" svg:y="0cm" svg:width="7.408cm" svg:height="2.593cm" draw:z-index="6"><draw:image xlink:href="Pictures/10000001000001180000006261EE4DE0.png" xlink:type="simple" xlink:show="embed" xlink:actuate="onLoad" draw:mime-type="image/png"/></draw:frame><text:s/><draw:frame draw:style-name="fr1" draw:name="Imagen9" text:anchor-type="char" svg:x="9.091cm" svg:y="-0.185cm" svg:width="7.699cm" svg:height="2.831cm" draw:z-index="8"><draw:image xlink:href="Pictures/10000001000001230000006B54BB665E.png" xlink:type="simple" xlink:show="embed" xlink:actuate="onLoad" draw:mime-type="image/png"/></draw:frame></text:p>
      <text:p text:style-name="P15"/>
      <text:p text:style-name="P15"/>
      <text:p text:style-name="P15"/>
      <text:p text:style-name="P15"><draw:frame draw:style-name="fr1" draw:name="Imagen8" text:anchor-type="char" svg:x="0.413cm" svg:y="0.132cm" svg:width="7.594cm" svg:height="2.699cm" draw:z-index="7"><draw:image xlink:href="Pictures/100000010000011F00000066533F0E5F.png" xlink:type="simple" xlink:show="embed" xlink:actuate="onLoad" draw:mime-type="image/png"/></draw:frame><draw:frame draw:style-name="fr1" draw:name="Imagen10" text:anchor-type="char" svg:x="8.784cm" svg:y="-0.106cm" svg:width="7.966cm" svg:height="2.646cm" draw:z-index="9"><draw:image xlink:href="Pictures/100000010000012D00000064A616347F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list text:continue-numbering="true" text:style-name="L1">
        <text:list-item>
          <text:p text:style-name="P11"><text:soft-page-break/><text:span text:style-name="T18">Procedimientos:</text:span></text:p>
          <text:list>
            <text:list-item>
              <text:p text:style-name="P17">Crea un procedimiento <text:span text:style-name="T25">llamado </text:span><text:span text:style-name="T26">mostrar_eventos_por_porcino</text:span> que reciba un identificador de porcino y muestre todos los eventos en los que ha participado, indicando tipo y fecha. </text:p>
            </text:list-item>
          </text:list>
        </text:list-item>
      </text:list>
      <table:table table:name="Táboa5" table:style-name="Táboa5">
        <table:table-column table:style-name="Táboa5.A"/>
        <table:table-row>
          <table:table-cell table:style-name="Táboa5.A1" office:value-type="string">
            <text:p text:style-name="P5" loext:marker-style-name="T4"><text:span text:style-name="T21">#Borro el procedimiento por si ya existe:</text:span></text:p>
            <text:p text:style-name="P5" loext:marker-style-name="T4"><text:span text:style-name="T5">DROP</text:span><text:span text:style-name="T6"> </text:span><text:span text:style-name="T5">PROCEDURE</text:span><text:span text:style-name="T6"> </text:span><text:span text:style-name="T5">IF</text:span><text:span text:style-name="T6"> </text:span><text:span text:style-name="T5">EXISTS</text:span><text:span text:style-name="T6"> </text:span><text:span text:style-name="T9">mostrar_eventos_por_porcino</text:span><text:span text:style-name="T10">;</text:span></text:p>
            <text:p text:style-name="P13" loext:marker-style-name="T4"/>
            <text:p text:style-name="P5" loext:marker-style-name="T4"><text:span text:style-name="T22">DELIMITER</text:span><text:span text:style-name="T9"> //</text:span></text:p>
            <text:p text:style-name="P13" loext:marker-style-name="T4"/>
            <text:p text:style-name="P5" loext:marker-style-name="T4"><text:span text:style-name="T21">#Creo el procedimiento definiendo el parámetro</text:span><text:span text:style-name="T21"/></text:p>
            <text:p text:style-name="P5" loext:marker-style-name="T4"><text:span text:style-name="T5">CREATE</text:span><text:span text:style-name="T6"> </text:span><text:span text:style-name="T5">PROCEDURE</text:span><text:span text:style-name="T6"> </text:span><text:span text:style-name="T9">mostrar_eventos_por_porcino</text:span><text:span text:style-name="T6">(</text:span><text:span text:style-name="T5">IN</text:span><text:span text:style-name="T6"> </text:span><text:span text:style-name="T9">p_idPorcino</text:span><text:span text:style-name="T6"> </text:span><text:span text:style-name="T13">INT</text:span><text:span text:style-name="T6">)</text:span></text:p>
            <text:p text:style-name="P5" loext:marker-style-name="T4"><text:span text:style-name="T5">BEGIN</text:span><text:span text:style-name="T5"/></text:p>
            <text:p text:style-name="P5" loext:marker-style-name="T4"><text:span text:style-name="T6"><text:tab/></text:span><text:span text:style-name="T21">#Consulta con select con un inner join para filtrar los eventos de cada idPorcino</text:span></text:p>
            <text:p text:style-name="P5" loext:marker-style-name="T4"><text:span text:style-name="T6"><text:s text:c="4"/></text:span><text:span text:style-name="T5">SELECT</text:span><text:span text:style-name="T6"> </text:span><text:span text:style-name="T9">pe</text:span><text:span text:style-name="T6">.</text:span><text:span text:style-name="T9">idEvento</text:span><text:span text:style-name="T6">, </text:span><text:span text:style-name="T9">pe</text:span><text:span text:style-name="T6">.</text:span><text:span text:style-name="T9">tipoEvento</text:span><text:span text:style-name="T6">, </text:span><text:span text:style-name="T9">pe</text:span><text:span text:style-name="T6">.</text:span><text:span text:style-name="T9">fechaInicio</text:span></text:p>
            <text:p text:style-name="P5" loext:marker-style-name="T4"><text:span text:style-name="T6"><text:s text:c="4"/></text:span><text:span text:style-name="T5">FROM</text:span><text:span text:style-name="T6"> </text:span><text:span text:style-name="T9">PorciEvento</text:span><text:span text:style-name="T6"> </text:span><text:span text:style-name="T9">pe</text:span></text:p>
            <text:p text:style-name="P5" loext:marker-style-name="T4"><text:span text:style-name="T6"><text:s text:c="4"/></text:span><text:span text:style-name="T5">INNER</text:span><text:span text:style-name="T6"> </text:span><text:span text:style-name="T5">JOIN</text:span><text:span text:style-name="T6"> </text:span><text:span text:style-name="T9">PorciEvento_Cercado</text:span><text:span text:style-name="T6"> </text:span><text:span text:style-name="T9">pec</text:span><text:span text:style-name="T6"> </text:span><text:span text:style-name="T5">ON</text:span><text:span text:style-name="T6"> </text:span><text:span text:style-name="T9">pe</text:span><text:span text:style-name="T6">.</text:span><text:span text:style-name="T9">idEvento</text:span><text:span text:style-name="T6"> = </text:span><text:span text:style-name="T9">pec</text:span><text:span text:style-name="T6">.</text:span><text:span text:style-name="T9">idEvento</text:span></text:p>
            <text:p text:style-name="P5" loext:marker-style-name="T4"><text:span text:style-name="T6"><text:s text:c="4"/></text:span><text:span text:style-name="T5">WHERE</text:span><text:span text:style-name="T6"> </text:span><text:span text:style-name="T9">pec</text:span><text:span text:style-name="T6">.</text:span><text:span text:style-name="T9">idPorcino</text:span><text:span text:style-name="T6"> = </text:span><text:span text:style-name="T9">p_idPorcino</text:span><text:span text:style-name="T10">;</text:span></text:p>
            <text:p text:style-name="P5" loext:marker-style-name="T4"><text:span text:style-name="T5">END</text:span><text:span text:style-name="T6"> //</text:span></text:p>
            <text:p text:style-name="P13" loext:marker-style-name="T4"/>
            <text:p text:style-name="P5" loext:marker-style-name="T4"><text:span text:style-name="T22">DELIMITER</text:span><text:span text:style-name="T9"> ;</text:span></text:p>
            <text:p text:style-name="P13" loext:marker-style-name="T4"/>
            <text:p text:style-name="P5" loext:marker-style-name="T4"><text:span text:style-name="T21">#Llamamos al procedimiento con el comando CALL para un porcino concreto.</text:span><text:span text:style-name="T21"/></text:p>
            <text:p text:style-name="P18"><text:span text:style-name="T5">CALL</text:span><text:span text:style-name="T6"> </text:span><text:span text:style-name="T16">mostrar_eventos_por_porcino</text:span><text:span text:style-name="T6">(</text:span><text:span text:style-name="T17">10</text:span><text:span text:style-name="T6">)</text:span><text:span text:style-name="T10">;</text:span></text:p>
            <text:p text:style-name="P19"><text:span text:style-name="T27">CALL</text:span><text:span text:style-name="T28"> </text:span><text:span text:style-name="T29">mostrar_eventos_por_porcino</text:span><text:span text:style-name="T28">(</text:span><text:span text:style-name="T30">1</text:span><text:span text:style-name="T31">6</text:span><text:span text:style-name="T28">)</text:span><text:span text:style-name="T32">;</text:span></text:p>
          </table:table-cell>
        </table:table-row>
      </table:table>
      <text:p text:style-name="P20"/>
      <text:p text:style-name="P20"/>
      <text:p text:style-name="P20"><draw:frame draw:style-name="fr2" draw:name="Imagen11" text:anchor-type="char" svg:width="8.387cm" svg:height="4.207cm" draw:z-index="10"><draw:image xlink:href="Pictures/100000010000013D0000009F02891197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3" draw:name="Imagen19" text:anchor-type="char" svg:width="7.832cm" svg:height="3.995cm" draw:z-index="18"><draw:image xlink:href="Pictures/100000010000012800000097CEF182C8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list text:continue-numbering="true" text:style-name="L1">
        <text:list-item>
          <text:list>
            <text:list-item>
              <text:p text:style-name="P21"><text:soft-page-break/>Crea un procedimiento <text:span text:style-name="T33">llamado </text:span><text:span text:style-name="T34">mostrar_estadisticas_evento</text:span><text:span text:style-name="T33"> </text:span>que reciba un tipo de evento y muestre el número total de eventos de ese tipo, junto con la duración media. </text:p>
            </text:list-item>
          </text:list>
        </text:list-item>
      </text:list>
      <table:table table:name="Táboa6" table:style-name="Táboa6">
        <table:table-column table:style-name="Táboa6.A"/>
        <table:table-row>
          <table:table-cell table:style-name="Táboa6.A1" office:value-type="string">
            <text:p text:style-name="P5" loext:marker-style-name="T4"><text:span text:style-name="T21">#Borro el procedimiento por si ya existe:</text:span></text:p>
            <text:p text:style-name="P5" loext:marker-style-name="T4"><text:span text:style-name="T5">DROP</text:span><text:span text:style-name="T6"> </text:span><text:span text:style-name="T5">PROCEDURE</text:span><text:span text:style-name="T6"> </text:span><text:span text:style-name="T5">IF</text:span><text:span text:style-name="T6"> </text:span><text:span text:style-name="T5">EXISTS</text:span><text:span text:style-name="T6"> </text:span><text:span text:style-name="T9">mostrar_estadisticas_evento</text:span><text:span text:style-name="T10">;</text:span></text:p>
            <text:p text:style-name="P13" loext:marker-style-name="T4"/>
            <text:p text:style-name="P5" loext:marker-style-name="T4"><text:span text:style-name="T22">DELIMITER</text:span><text:span text:style-name="T9"> //</text:span></text:p>
            <text:p text:style-name="P13" loext:marker-style-name="T4"/>
            <text:p text:style-name="P5" loext:marker-style-name="T4"><text:span text:style-name="T21">#Creo el procedimiento definiendo el parámetro</text:span><text:span text:style-name="T21"/></text:p>
            <text:p text:style-name="P5" loext:marker-style-name="T4"><text:span text:style-name="T5">CREATE</text:span><text:span text:style-name="T6"> </text:span><text:span text:style-name="T5">PROCEDURE</text:span><text:span text:style-name="T6"> </text:span><text:span text:style-name="T9">mostrar_estadisticas_evento</text:span><text:span text:style-name="T6">(</text:span><text:span text:style-name="T5">IN</text:span><text:span text:style-name="T6"> </text:span><text:span text:style-name="T9">pe_tipoEvento</text:span><text:span text:style-name="T6"> </text:span><text:span text:style-name="T13">VARCHAR</text:span><text:span text:style-name="T6">(</text:span><text:span text:style-name="T17">30</text:span><text:span text:style-name="T6">))</text:span></text:p>
            <text:p text:style-name="P5" loext:marker-style-name="T4"><text:span text:style-name="T5">BEGIN</text:span><text:span text:style-name="T5"/></text:p>
            <text:p text:style-name="P5" loext:marker-style-name="T4"><text:span text:style-name="T6"><text:tab/></text:span><text:span text:style-name="T21">#Consulta con select para contar las coincidencias del tipo de evento y su duración media</text:span></text:p>
            <text:p text:style-name="P5" loext:marker-style-name="T4"><text:span text:style-name="T6"><text:s text:c="4"/></text:span><text:span text:style-name="T5">SELECT</text:span><text:span text:style-name="T6"> </text:span><text:span text:style-name="T13">COUNT</text:span><text:span text:style-name="T6">(</text:span><text:span text:style-name="T9">pe</text:span><text:span text:style-name="T6">.</text:span><text:span text:style-name="T9">idEvento</text:span><text:span text:style-name="T6">) </text:span><text:span text:style-name="T5">AS</text:span><text:span text:style-name="T6"> </text:span><text:span text:style-name="T9">NUMERO_TOTAL_EVENTOS</text:span><text:span text:style-name="T6">, </text:span><text:span text:style-name="T13">ROUND</text:span><text:span text:style-name="T6">(</text:span><text:span text:style-name="T13">AVG</text:span><text:span text:style-name="T6">(</text:span><text:span text:style-name="T9">duracionMinutos</text:span><text:span text:style-name="T6">)) </text:span><text:span text:style-name="T5">AS</text:span><text:span text:style-name="T6"> </text:span><text:span text:style-name="T9">DURACION_MEDIA_MINUTOS</text:span></text:p>
            <text:p text:style-name="P5" loext:marker-style-name="T4"><text:span text:style-name="T6"><text:s text:c="4"/></text:span><text:span text:style-name="T5">FROM</text:span><text:span text:style-name="T6"> </text:span><text:span text:style-name="T9">PorciEvento</text:span><text:span text:style-name="T6"> </text:span><text:span text:style-name="T9">pe</text:span></text:p>
            <text:p text:style-name="P5" loext:marker-style-name="T4"><text:span text:style-name="T6"><text:s text:c="4"/></text:span><text:span text:style-name="T5">WHERE</text:span><text:span text:style-name="T6"> </text:span><text:span text:style-name="T9">pe</text:span><text:span text:style-name="T6">.</text:span><text:span text:style-name="T9">tipoEvento</text:span><text:span text:style-name="T6"> = </text:span><text:span text:style-name="T9">pe_tipoEvento</text:span><text:span text:style-name="T10">;</text:span></text:p>
            <text:p text:style-name="P5" loext:marker-style-name="T4"><text:span text:style-name="T5">END</text:span><text:span text:style-name="T6"> //</text:span></text:p>
            <text:p text:style-name="P13" loext:marker-style-name="T4"/>
            <text:p text:style-name="P5" loext:marker-style-name="T4"><text:span text:style-name="T22">DELIMITER</text:span><text:span text:style-name="T9"> ;</text:span></text:p>
            <text:p text:style-name="P13" loext:marker-style-name="T4"/>
            <text:p text:style-name="P5" loext:marker-style-name="T4"><text:span text:style-name="T21">#Llamamos al procedimiento con el comando CALL para un </text:span><text:span text:style-name="T35">tipo de evento concreto</text:span><text:span text:style-name="T21">.</text:span></text:p>
            <text:p text:style-name="P5" loext:marker-style-name="T4"><text:span text:style-name="T5">CALL</text:span><text:span text:style-name="T6"> </text:span><text:span text:style-name="T16">mostrar_estadisticas_evento</text:span><text:span text:style-name="T6">(</text:span><text:span text:style-name="T13">"Conflicto"</text:span><text:span text:style-name="T6">)</text:span><text:span text:style-name="T10">;</text:span></text:p>
            <text:p text:style-name="P5" loext:marker-style-name="T4"><text:span text:style-name="T5">CALL</text:span><text:span text:style-name="T6"> </text:span><text:span text:style-name="T16">mostrar_estadisticas_evento</text:span><text:span text:style-name="T6">(</text:span><text:span text:style-name="T13">"Reunión"</text:span><text:span text:style-name="T6">)</text:span><text:span text:style-name="T10">;</text:span></text:p>
            <text:p text:style-name="P18"><text:span text:style-name="T5">CALL</text:span><text:span text:style-name="T6"> </text:span><text:span text:style-name="T16">mostrar_estadisticas_evento</text:span><text:span text:style-name="T6">(</text:span><text:span text:style-name="T13">"Juego"</text:span><text:span text:style-name="T6">)</text:span><text:span text:style-name="T10">;</text:span></text:p>
          </table:table-cell>
        </table:table-row>
      </table:table>
      <text:p text:style-name="P20"/>
      <text:p text:style-name="P20"><draw:frame draw:style-name="fr2" draw:name="Imagen12" text:anchor-type="char" svg:width="10.239cm" svg:height="2.752cm" draw:z-index="11"><draw:image xlink:href="Pictures/100000010000018300000068A4193E31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><draw:frame draw:style-name="fr4" draw:name="Imagen14" text:anchor-type="char" svg:x="3.56cm" svg:y="-0.212cm" svg:width="9.977cm" svg:height="2.619cm" draw:z-index="13"><draw:image xlink:href="Pictures/100000010000017900000063630B2ECE.png" xlink:type="simple" xlink:show="embed" xlink:actuate="onLoad" draw:mime-type="image/png"/></draw:frame></text:p>
      <text:p text:style-name="P20"/>
      <text:p text:style-name="P20"/>
      <text:p text:style-name="P20"/>
      <text:p text:style-name="P20"><draw:frame draw:style-name="fr4" draw:name="Imagen13" text:anchor-type="char" svg:x="3.415cm" svg:y="0.355cm" svg:width="10.089cm" svg:height="2.722cm" draw:z-index="12"><draw:image xlink:href="Pictures/100000010000016F000000634657839E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list text:continue-numbering="true" text:style-name="L1">
        <text:list-item>
          <text:p text:style-name="P11"><text:soft-page-break/><text:span text:style-name="T18">Cursores:</text:span></text:p>
          <text:list>
            <text:list-item>
              <text:p text:style-name="P22">Crea un procedimiento <text:span text:style-name="T36">llamado </text:span><text:span text:style-name="T37">cursor_porcinos_intensidad</text:span> que utilice un cursor implícito para recorrer los porcinos y mostrar aquellos cuya intensidad media de participación sea superior a un valor dado como parámetro. </text:p>
            </text:list-item>
          </text:list>
        </text:list-item>
      </text:list>
      <table:table table:name="Táboa7" table:style-name="Táboa7">
        <table:table-column table:style-name="Táboa7.A"/>
        <table:table-row>
          <table:table-cell table:style-name="Táboa7.A1" office:value-type="string">
            <text:p text:style-name="P5" loext:marker-style-name="T4"><text:span text:style-name="T21"># Borro el procedimiento por si ya existe</text:span></text:p>
            <text:p text:style-name="P5" loext:marker-style-name="T4"><text:span text:style-name="T5">DROP</text:span><text:span text:style-name="T6"> </text:span><text:span text:style-name="T5">PROCEDURE</text:span><text:span text:style-name="T6"> </text:span><text:span text:style-name="T5">IF</text:span><text:span text:style-name="T6"> </text:span><text:span text:style-name="T5">EXISTS</text:span><text:span text:style-name="T6"> </text:span><text:span text:style-name="T9">cursor_porcinos_intensidad</text:span><text:span text:style-name="T10">;</text:span></text:p>
            <text:p text:style-name="P13" loext:marker-style-name="T4"/>
            <text:p text:style-name="P5" loext:marker-style-name="T4"><text:span text:style-name="T22">DELIMITER</text:span><text:span text:style-name="T9"> //</text:span></text:p>
            <text:p text:style-name="P13" loext:marker-style-name="T4"/>
            <text:p text:style-name="P5" loext:marker-style-name="T4"><text:span text:style-name="T5">CREATE</text:span><text:span text:style-name="T6"> </text:span><text:span text:style-name="T5">PROCEDURE</text:span><text:span text:style-name="T6"> </text:span><text:span text:style-name="T9">cursor_porcinos_intensidad</text:span><text:span text:style-name="T6">(</text:span><text:span text:style-name="T5">IN</text:span><text:span text:style-name="T6"> </text:span><text:span text:style-name="T9">p_umbral_intensidad</text:span><text:span text:style-name="T6"> </text:span><text:span text:style-name="T13">DECIMAL</text:span><text:span text:style-name="T6">(</text:span><text:span text:style-name="T17">5</text:span><text:span text:style-name="T6">,</text:span><text:span text:style-name="T17">2</text:span><text:span text:style-name="T6">))</text:span></text:p>
            <text:p text:style-name="P5" loext:marker-style-name="T4"><text:span text:style-name="T5">BEGIN</text:span><text:span text:style-name="T5"/></text:p>
            <text:p text:style-name="P5" loext:marker-style-name="T4"><text:span text:style-name="T6"><text:s text:c="4"/></text:span><text:span text:style-name="T21">-- 1. VARIABLES </text:span></text:p>
            <text:p text:style-name="P5" loext:marker-style-name="T4"><text:span text:style-name="T6"><text:s text:c="4"/></text:span><text:span text:style-name="T21">-- Necesitamos una variable por cada columna que devuelva nuestro SELECT</text:span></text:p>
            <text:p text:style-name="P5" loext:marker-style-name="T4"><text:span text:style-name="T6"><text:s text:c="4"/></text:span><text:span text:style-name="T5">DECLARE</text:span><text:span text:style-name="T6"> </text:span><text:span text:style-name="T9">v_idPorcino</text:span><text:span text:style-name="T6"> </text:span><text:span text:style-name="T13">INT</text:span><text:span text:style-name="T10">;</text:span></text:p>
            <text:p text:style-name="P5" loext:marker-style-name="T4"><text:span text:style-name="T6"><text:s text:c="4"/></text:span><text:span text:style-name="T5">DECLARE</text:span><text:span text:style-name="T6"> </text:span><text:span text:style-name="T9">v_intensidad</text:span><text:span text:style-name="T6"> </text:span><text:span text:style-name="T13">DECIMAL</text:span><text:span text:style-name="T6">(</text:span><text:span text:style-name="T17">5</text:span><text:span text:style-name="T6">,</text:span><text:span text:style-name="T17">2</text:span><text:span text:style-name="T6">)</text:span><text:span text:style-name="T10">;</text:span></text:p>
            <text:p text:style-name="P5" loext:marker-style-name="T4"><text:span text:style-name="T6"><text:s text:c="4"/></text:span><text:span text:style-name="T5">DECLARE</text:span><text:span text:style-name="T6"> </text:span><text:span text:style-name="T9">fin_cursor</text:span><text:span text:style-name="T6"> </text:span><text:span text:style-name="T13">INT</text:span><text:span text:style-name="T6"> </text:span><text:span text:style-name="T5">DEFAULT</text:span><text:span text:style-name="T6"> </text:span><text:span text:style-name="T17">0</text:span><text:span text:style-name="T10">;</text:span><text:span text:style-name="T6"> </text:span><text:span text:style-name="T21">-- Variable para finalizar</text:span></text:p>
            <text:p text:style-name="P5" loext:marker-style-name="T4"><text:span text:style-name="T6"><text:s text:c="4"/></text:span><text:span text:style-name="T21">-- 2. CURSOR </text:span></text:p>
            <text:p text:style-name="P5" loext:marker-style-name="T4"><text:span text:style-name="T6"><text:s text:c="4"/></text:span><text:span text:style-name="T21">-- Incluye un SELECT</text:span></text:p>
            <text:p text:style-name="P5" loext:marker-style-name="T4"><text:span text:style-name="T6"><text:s text:c="4"/></text:span><text:span text:style-name="T5">DECLARE</text:span><text:span text:style-name="T6"> </text:span><text:span text:style-name="T9">c_porcinos</text:span><text:span text:style-name="T6"> </text:span><text:span text:style-name="T5">CURSOR</text:span><text:span text:style-name="T6"> </text:span><text:span text:style-name="T5">FOR</text:span><text:span text:style-name="T6"> </text:span></text:p>
            <text:p text:style-name="P5" loext:marker-style-name="T4"><text:span text:style-name="T6"><text:s text:c="8"/></text:span><text:span text:style-name="T5">SELECT</text:span><text:span text:style-name="T6"> </text:span><text:span text:style-name="T9">pec</text:span><text:span text:style-name="T6">.</text:span><text:span text:style-name="T9">idPorcino</text:span><text:span text:style-name="T6">, </text:span><text:span text:style-name="T13">ROUND</text:span><text:span text:style-name="T6">(</text:span><text:span text:style-name="T13">AVG</text:span><text:span text:style-name="T6">(</text:span><text:span text:style-name="T9">pec</text:span><text:span text:style-name="T6">.</text:span><text:span text:style-name="T9">intensidad</text:span><text:span text:style-name="T6">)) </text:span><text:span text:style-name="T5">AS</text:span><text:span text:style-name="T6"> </text:span><text:span text:style-name="T9">INTENSIDAD_MEDIA</text:span></text:p>
            <text:p text:style-name="P5" loext:marker-style-name="T4"><text:span text:style-name="T6"><text:s text:c="8"/></text:span><text:span text:style-name="T5">FROM</text:span><text:span text:style-name="T6"> </text:span><text:span text:style-name="T9">PorciEvento_Cercado</text:span><text:span text:style-name="T6"> </text:span><text:span text:style-name="T9">pec</text:span><text:span text:style-name="T6"> </text:span></text:p>
            <text:p text:style-name="P5" loext:marker-style-name="T4"><text:span text:style-name="T6"><text:s text:c="8"/></text:span><text:span text:style-name="T5">GROUP</text:span><text:span text:style-name="T6"> </text:span><text:span text:style-name="T5">BY</text:span><text:span text:style-name="T6"> </text:span><text:span text:style-name="T9">pec</text:span><text:span text:style-name="T6">.</text:span><text:span text:style-name="T9">idPorcino</text:span><text:span text:style-name="T6"> </text:span></text:p>
            <text:p text:style-name="P5" loext:marker-style-name="T4"><text:span text:style-name="T6"><text:s text:c="8"/></text:span><text:span text:style-name="T5">HAVING</text:span><text:span text:style-name="T6"> </text:span><text:span text:style-name="T9">INTENSIDAD_MEDIA</text:span><text:span text:style-name="T6"> &gt; </text:span><text:span text:style-name="T9">p_umbral_intensidad</text:span><text:span text:style-name="T10">;</text:span></text:p>
            <text:p text:style-name="P5" loext:marker-style-name="T4"><text:span text:style-name="T6"><text:s text:c="4"/></text:span><text:span text:style-name="T21">-- 3. HANDLER(Manejo de excepciones durante la ejecución del bucle)</text:span></text:p>
            <text:p text:style-name="P5" loext:marker-style-name="T4"><text:span text:style-name="T6"><text:s text:c="4"/></text:span><text:span text:style-name="T5">DECLARE</text:span><text:span text:style-name="T6"> </text:span><text:span text:style-name="T5">CONTINUE</text:span><text:span text:style-name="T6"> </text:span><text:span text:style-name="T9">HANDLER</text:span><text:span text:style-name="T6"> </text:span><text:span text:style-name="T5">FOR</text:span><text:span text:style-name="T6"> </text:span><text:span text:style-name="T5">NOT</text:span><text:span text:style-name="T6"> </text:span><text:span text:style-name="T5">FOUND</text:span><text:span text:style-name="T6"> </text:span><text:span text:style-name="T13">SET</text:span><text:span text:style-name="T6"> </text:span><text:span text:style-name="T9">fin_cursor</text:span><text:span text:style-name="T6"> = </text:span><text:span text:style-name="T17">1</text:span><text:span text:style-name="T10">;</text:span></text:p>
            <text:p text:style-name="P5" loext:marker-style-name="T4"><text:span text:style-name="T6"><text:s text:c="4"/></text:span><text:span text:style-name="T21">#Creamos una tabla temporal vacía para ir guardando los datos porque MySQL no tiene un comando</text:span><text:span text:style-name="T38"> </text:span><text:span text:style-name="T21">directo para mostrar los datos generados por el bucle</text:span></text:p>
            <text:p text:style-name="P5" loext:marker-style-name="T4"><text:span text:style-name="T6"><text:s text:c="4"/></text:span><text:span text:style-name="T5">DROP</text:span><text:span text:style-name="T6"> </text:span><text:span text:style-name="T5">TEMPORARY</text:span><text:span text:style-name="T6"> </text:span><text:span text:style-name="T5">TABLE</text:span><text:span text:style-name="T6"> </text:span><text:span text:style-name="T5">IF</text:span><text:span text:style-name="T6"> </text:span><text:span text:style-name="T5">EXISTS</text:span><text:span text:style-name="T6"> </text:span><text:span text:style-name="T9">Temp_Resultados</text:span><text:span text:style-name="T10">;</text:span></text:p>
            <text:p text:style-name="P5" loext:marker-style-name="T4"><text:span text:style-name="T6"><text:s text:c="4"/></text:span><text:span text:style-name="T5">CREATE</text:span><text:span text:style-name="T6"> </text:span><text:span text:style-name="T5">TEMPORARY</text:span><text:span text:style-name="T6"> </text:span><text:span text:style-name="T5">TABLE</text:span><text:span text:style-name="T6"> </text:span><text:span text:style-name="T9">Temp_Resultados</text:span><text:span text:style-name="T6"> (</text:span><text:span text:style-name="T9">idPorcino</text:span><text:span text:style-name="T6"> </text:span><text:span text:style-name="T13">INT</text:span><text:span text:style-name="T6">, </text:span><text:span text:style-name="T9">intensidad_media</text:span><text:span text:style-name="T6"> </text:span><text:span text:style-name="T13">DECIMAL</text:span><text:span text:style-name="T6">(</text:span><text:span text:style-name="T17">5</text:span><text:span text:style-name="T6">,</text:span><text:span text:style-name="T17">2</text:span><text:span text:style-name="T6">))</text:span><text:span text:style-name="T10">;</text:span></text:p>
            <text:p text:style-name="P5" loext:marker-style-name="T4"><text:span text:style-name="T6"><text:s text:c="4"/></text:span><text:span text:style-name="T21">-- 4. BUCLE DE LECTURA</text:span></text:p>
            <text:p text:style-name="P5" loext:marker-style-name="T4"><text:span text:style-name="T6"><text:s text:c="4"/></text:span><text:span text:style-name="T5">OPEN</text:span><text:span text:style-name="T6"> </text:span><text:span text:style-name="T9">c_porcinos</text:span><text:span text:style-name="T10">;</text:span></text:p>
            <text:p text:style-name="P5" loext:marker-style-name="T4"><text:span text:style-name="T6"><text:s text:c="4"/></text:span><text:span text:style-name="T9">mi_bucle</text:span><text:span text:style-name="T6">: </text:span><text:span text:style-name="T5">LOOP</text:span></text:p>
            <text:p text:style-name="P5" loext:marker-style-name="T4"><text:span text:style-name="T6"><text:s text:c="8"/></text:span><text:span text:style-name="T21">-- A. Sacar datos del cursor (FETCH)</text:span></text:p>
            <text:p text:style-name="P5" loext:marker-style-name="T4"><text:span text:style-name="T6"><text:s text:c="8"/></text:span><text:span text:style-name="T5">FETCH</text:span><text:span text:style-name="T6"> </text:span><text:span text:style-name="T9">c_porcinos</text:span><text:span text:style-name="T6"> </text:span><text:span text:style-name="T5">INTO</text:span><text:span text:style-name="T6"> </text:span><text:span text:style-name="T9">v_idPorcino</text:span><text:span text:style-name="T6">, </text:span><text:span text:style-name="T9">v_intensidad</text:span><text:span text:style-name="T10">;</text:span></text:p>
            <text:p text:style-name="P5" loext:marker-style-name="T4"><text:span text:style-name="T6"><text:s text:c="8"/></text:span><text:span text:style-name="T21">-- B. Comprobar semáforo de salida</text:span></text:p>
            <text:p text:style-name="P5" loext:marker-style-name="T4"><text:span text:style-name="T6"><text:s text:c="8"/></text:span><text:span text:style-name="T5">IF</text:span><text:span text:style-name="T6"> </text:span><text:span text:style-name="T9">fin_cursor</text:span><text:span text:style-name="T6"> = </text:span><text:span text:style-name="T17">1</text:span><text:span text:style-name="T6"> </text:span><text:span text:style-name="T5">THEN</text:span></text:p>
            <text:p text:style-name="P5" loext:marker-style-name="T4"><text:span text:style-name="T6"><text:s text:c="12"/></text:span><text:span text:style-name="T5">LEAVE</text:span><text:span text:style-name="T6"> </text:span><text:span text:style-name="T9">mi_bucle</text:span><text:span text:style-name="T10">;</text:span></text:p>
            <text:p text:style-name="P5" loext:marker-style-name="T4"><text:span text:style-name="T6"><text:s text:c="8"/></text:span><text:span text:style-name="T5">END</text:span><text:span text:style-name="T6"> </text:span><text:span text:style-name="T5">IF</text:span><text:span text:style-name="T10">;</text:span></text:p>
            <text:p text:style-name="P5" loext:marker-style-name="T4"><text:span text:style-name="T6"><text:s text:c="8"/></text:span><text:span text:style-name="T21">-- C. Insertar los datos de las variables en la tabla temporal</text:span></text:p>
            <text:p text:style-name="P5" loext:marker-style-name="T4"><text:span text:style-name="T6"><text:tab/><text:tab/></text:span><text:span text:style-name="T5">INSERT</text:span><text:span text:style-name="T6"> </text:span><text:span text:style-name="T5">INTO</text:span><text:span text:style-name="T6"> </text:span><text:span text:style-name="T16">Temp_Resultados</text:span><text:span text:style-name="T6"> (</text:span><text:span text:style-name="T9">idPorcino</text:span><text:span text:style-name="T6">, </text:span><text:span text:style-name="T9">intensidad_media</text:span><text:span text:style-name="T6">) </text:span><text:span text:style-name="T5">VALUES</text:span><text:span text:style-name="T6"> (</text:span><text:span text:style-name="T16">v_idPorcino</text:span><text:span text:style-name="T6">, </text:span><text:span text:style-name="T16">v_intensidad</text:span><text:span text:style-name="T6">)</text:span><text:span text:style-name="T10">;</text:span><text:span text:style-name="T6"> </text:span></text:p>
            <text:p text:style-name="P5" loext:marker-style-name="T4"><text:span text:style-name="T6"><text:s text:c="4"/></text:span><text:span text:style-name="T5">END</text:span><text:span text:style-name="T6"> </text:span><text:span text:style-name="T5">LOOP</text:span><text:span text:style-name="T6"> </text:span><text:span text:style-name="T9">mi_bucle</text:span><text:span text:style-name="T10">;</text:span></text:p>
            <text:p text:style-name="P5" loext:marker-style-name="T4"><text:span text:style-name="T6"><text:s text:c="4"/></text:span><text:span text:style-name="T5">CLOSE</text:span><text:span text:style-name="T6"> </text:span><text:span text:style-name="T9">c_porcinos</text:span><text:span text:style-name="T10">;</text:span></text:p>
            <text:p text:style-name="P5" loext:marker-style-name="T4"><text:span text:style-name="T6"><text:s text:c="4"/></text:span><text:span text:style-name="T21">-- 5. Mostrar los resultados acumulados</text:span></text:p>
            <text:p text:style-name="P5" loext:marker-style-name="T4"><text:span text:style-name="T6"><text:s text:c="4"/></text:span><text:span text:style-name="T5">SELECT</text:span><text:span text:style-name="T6"> * </text:span><text:span text:style-name="T5">FROM</text:span><text:span text:style-name="T6"> </text:span><text:span text:style-name="T16">Temp_Resultados</text:span><text:span text:style-name="T10">;</text:span></text:p>
            <text:p text:style-name="P5" loext:marker-style-name="T4"><text:span text:style-name="T5">END</text:span><text:span text:style-name="T6"> //</text:span></text:p>
            <text:p text:style-name="P13" loext:marker-style-name="T4"/>
            <text:p text:style-name="P5" loext:marker-style-name="T4"><text:span text:style-name="T22">DELIMITER</text:span><text:span text:style-name="T9"> ;</text:span></text:p>
            <text:p text:style-name="P13" loext:marker-style-name="T4"/>
            <text:p text:style-name="P5" loext:marker-style-name="T4"><text:span text:style-name="T21"># Llamada de prueba (por ejemplo, buscar porcinos con intensidad media superior a 6.5)</text:span><text:span text:style-name="T21"/></text:p>
            <text:p text:style-name="P18"><text:span text:style-name="T5">CALL</text:span><text:span text:style-name="T6"> </text:span><text:span text:style-name="T39">cursor_porcinos_intensidad</text:span><text:span text:style-name="T6">(</text:span><text:span text:style-name="T17">6.5</text:span><text:span text:style-name="T6">)</text:span><text:span text:style-name="T10">;</text:span></text:p>
          </table:table-cell>
        </table:table-row>
      </table:table>
      <text:p text:style-name="P20"><text:soft-page-break/></text:p>
      <text:p text:style-name="P20"><draw:frame draw:style-name="fr4" draw:name="Imagen15" text:anchor-type="char" svg:x="4.567cm" svg:y="0.132cm" svg:width="7.064cm" svg:height="15.744cm" draw:z-index="14"><draw:image xlink:href="Pictures/100000010000010B0000025395DF276C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list text:continue-numbering="true" text:style-name="L1">
        <text:list-item>
          <text:list>
            <text:list-item>
              <text:p text:style-name="P23"><text:soft-page-break/>Crea un procedimiento <text:span text:style-name="T40">llamado </text:span><text:span text:style-name="T41">cursor_eventos_mas_5</text:span> que utilice un cursor explícito para recorrer los eventos ordenados por fecha y mostrar únicamente los que tengan más de 5 participantes. </text:p>
            </text:list-item>
          </text:list>
        </text:list-item>
      </text:list>
      <table:table table:name="Táboa8" table:style-name="Táboa8">
        <table:table-column table:style-name="Táboa8.A"/>
        <table:table-row>
          <table:table-cell table:style-name="Táboa8.A1" office:value-type="string">
            <text:p text:style-name="P5" loext:marker-style-name="T4"><text:span text:style-name="T21"># Borro el procedimiento por si ya existe</text:span></text:p>
            <text:p text:style-name="P5" loext:marker-style-name="T4"><text:span text:style-name="T5">DROP</text:span><text:span text:style-name="T6"> </text:span><text:span text:style-name="T5">PROCEDURE</text:span><text:span text:style-name="T6"> </text:span><text:span text:style-name="T5">IF</text:span><text:span text:style-name="T6"> </text:span><text:span text:style-name="T5">EXISTS</text:span><text:span text:style-name="T6"> </text:span><text:span text:style-name="T9">cursor_eventos_mas_5</text:span><text:span text:style-name="T10">;</text:span></text:p>
            <text:p text:style-name="P5" loext:marker-style-name="T4"><text:span text:style-name="T22">DELIMITER</text:span><text:span text:style-name="T9"> //</text:span></text:p>
            <text:p text:style-name="P13" loext:marker-style-name="T4"/>
            <text:p text:style-name="P5" loext:marker-style-name="T4"><text:span text:style-name="T5">CREATE</text:span><text:span text:style-name="T6"> </text:span><text:span text:style-name="T5">PROCEDURE</text:span><text:span text:style-name="T6"> </text:span><text:span text:style-name="T9">cursor_eventos_mas_5</text:span><text:span text:style-name="T6">()</text:span></text:p>
            <text:p text:style-name="P5" loext:marker-style-name="T4"><text:span text:style-name="T5">BEGIN</text:span><text:span text:style-name="T5"/></text:p>
            <text:p text:style-name="P5" loext:marker-style-name="T4"><text:span text:style-name="T6"><text:s text:c="4"/></text:span><text:span text:style-name="T21">-- 1. VARIABLES </text:span></text:p>
            <text:p text:style-name="P5" loext:marker-style-name="T4"><text:span text:style-name="T6"><text:s text:c="4"/></text:span><text:span text:style-name="T21">-- Necesitamos una variable por cada columna que devuelva el SELECT</text:span></text:p>
            <text:p text:style-name="P5" loext:marker-style-name="T4"><text:span text:style-name="T6"><text:s text:c="4"/></text:span><text:span text:style-name="T5">DECLARE</text:span><text:span text:style-name="T6"> </text:span><text:span text:style-name="T9">v_idEvento</text:span><text:span text:style-name="T6"> </text:span><text:span text:style-name="T13">INT</text:span><text:span text:style-name="T10">;</text:span></text:p>
            <text:p text:style-name="P5" loext:marker-style-name="T4"><text:span text:style-name="T6"><text:s text:c="4"/></text:span><text:span text:style-name="T5">DECLARE</text:span><text:span text:style-name="T6"> </text:span><text:span text:style-name="T9">v_fechaInicio</text:span><text:span text:style-name="T6"> </text:span><text:span text:style-name="T13">DATE</text:span><text:span text:style-name="T10">;</text:span></text:p>
            <text:p text:style-name="P5" loext:marker-style-name="T4"><text:span text:style-name="T6"><text:tab/></text:span><text:span text:style-name="T5">DECLARE</text:span><text:span text:style-name="T6"> </text:span><text:span text:style-name="T9">v_participantes</text:span><text:span text:style-name="T6"> </text:span><text:span text:style-name="T13">INT</text:span><text:span text:style-name="T10">;</text:span></text:p>
            <text:p text:style-name="P5" loext:marker-style-name="T4"><text:span text:style-name="T6"><text:s text:c="4"/></text:span><text:span text:style-name="T5">DECLARE</text:span><text:span text:style-name="T6"> </text:span><text:span text:style-name="T9">fin_cursor</text:span><text:span text:style-name="T6"> </text:span><text:span text:style-name="T13">INT</text:span><text:span text:style-name="T6"> </text:span><text:span text:style-name="T5">DEFAULT</text:span><text:span text:style-name="T6"> </text:span><text:span text:style-name="T17">0</text:span><text:span text:style-name="T10">;</text:span><text:span text:style-name="T6"> </text:span><text:span text:style-name="T21">-- Variable para finalizar</text:span></text:p>
            <text:p text:style-name="P5" loext:marker-style-name="T4"><text:span text:style-name="T6"><text:s text:c="4"/></text:span><text:span text:style-name="T21">-- 2. CURSOR </text:span></text:p>
            <text:p text:style-name="P5" loext:marker-style-name="T4"><text:span text:style-name="T6"><text:s text:c="4"/></text:span><text:span text:style-name="T21">-- Incluye una consulta SELECT</text:span></text:p>
            <text:p text:style-name="P5" loext:marker-style-name="T4"><text:span text:style-name="T6"><text:s text:c="4"/></text:span><text:span text:style-name="T5">DECLARE</text:span><text:span text:style-name="T6"> </text:span><text:span text:style-name="T9">c_eventos</text:span><text:span text:style-name="T6"> </text:span><text:span text:style-name="T5">CURSOR</text:span><text:span text:style-name="T6"> </text:span><text:span text:style-name="T5">FOR</text:span><text:span text:style-name="T6"> </text:span></text:p>
            <text:p text:style-name="P5" loext:marker-style-name="T4"><text:span text:style-name="T6"><text:s text:c="8"/></text:span><text:span text:style-name="T5">SELECT</text:span><text:span text:style-name="T6"> </text:span><text:span text:style-name="T9">pe</text:span><text:span text:style-name="T6">.</text:span><text:span text:style-name="T9">idEvento</text:span><text:span text:style-name="T6">, </text:span><text:span text:style-name="T9">pe</text:span><text:span text:style-name="T6">.</text:span><text:span text:style-name="T9">fechaInicio</text:span><text:span text:style-name="T6">, </text:span><text:span text:style-name="T13">COUNT</text:span><text:span text:style-name="T6">(</text:span><text:span text:style-name="T9">pec</text:span><text:span text:style-name="T6">.</text:span><text:span text:style-name="T9">idPorcino</text:span><text:span text:style-name="T6">) </text:span><text:span text:style-name="T5">AS</text:span><text:span text:style-name="T6"> </text:span><text:span text:style-name="T9">NUMERO_PARTICIPANTES</text:span></text:p>
            <text:p text:style-name="P5" loext:marker-style-name="T4"><text:span text:style-name="T6"><text:s text:c="8"/></text:span><text:span text:style-name="T5">FROM</text:span><text:span text:style-name="T6"> </text:span><text:span text:style-name="T9">PorciEvento</text:span><text:span text:style-name="T6"> </text:span><text:span text:style-name="T9">pe</text:span></text:p>
            <text:p text:style-name="P5" loext:marker-style-name="T4"><text:span text:style-name="T6"><text:s text:c="8"/></text:span><text:span text:style-name="T5">INNER</text:span><text:span text:style-name="T6"> </text:span><text:span text:style-name="T5">JOIN</text:span><text:span text:style-name="T6"> </text:span><text:span text:style-name="T9">PorciEvento_Cercado</text:span><text:span text:style-name="T6"> </text:span><text:span text:style-name="T9">pec</text:span><text:span text:style-name="T6"> </text:span><text:span text:style-name="T5">ON</text:span><text:span text:style-name="T6"> </text:span><text:span text:style-name="T9">pe</text:span><text:span text:style-name="T6">.</text:span><text:span text:style-name="T9">idEvento</text:span><text:span text:style-name="T6"> = </text:span><text:span text:style-name="T9">pec</text:span><text:span text:style-name="T6">.</text:span><text:span text:style-name="T9">idEvento</text:span></text:p>
            <text:p text:style-name="P5" loext:marker-style-name="T4"><text:span text:style-name="T6"><text:s text:c="8"/></text:span><text:span text:style-name="T5">GROUP</text:span><text:span text:style-name="T6"> </text:span><text:span text:style-name="T5">BY</text:span><text:span text:style-name="T6"> </text:span><text:span text:style-name="T9">pe</text:span><text:span text:style-name="T6">.</text:span><text:span text:style-name="T9">idEvento</text:span></text:p>
            <text:p text:style-name="P5" loext:marker-style-name="T4"><text:span text:style-name="T6"><text:s text:c="8"/></text:span><text:span text:style-name="T5">HAVING</text:span><text:span text:style-name="T6"> </text:span><text:span text:style-name="T9">NUMERO_PARTICIPANTES</text:span><text:span text:style-name="T6"> &gt; </text:span><text:span text:style-name="T17">5</text:span></text:p>
            <text:p text:style-name="P5" loext:marker-style-name="T4"><text:span text:style-name="T6"><text:s text:c="4"/><text:tab/></text:span><text:span text:style-name="T5">ORDER</text:span><text:span text:style-name="T6"> </text:span><text:span text:style-name="T5">BY</text:span><text:span text:style-name="T6"> </text:span><text:span text:style-name="T9">pe</text:span><text:span text:style-name="T6">.</text:span><text:span text:style-name="T9">fechaInicio</text:span><text:span text:style-name="T10">;</text:span></text:p>
            <text:p text:style-name="P5" loext:marker-style-name="T4"><text:span text:style-name="T6"><text:s text:c="4"/></text:span><text:span text:style-name="T21">-- 3. HANDLER(Manejo de excepciones durante la ejecución del bucle)</text:span></text:p>
            <text:p text:style-name="P5" loext:marker-style-name="T4"><text:span text:style-name="T6"><text:s text:c="4"/></text:span><text:span text:style-name="T5">DECLARE</text:span><text:span text:style-name="T6"> </text:span><text:span text:style-name="T5">CONTINUE</text:span><text:span text:style-name="T6"> </text:span><text:span text:style-name="T9">HANDLER</text:span><text:span text:style-name="T6"> </text:span><text:span text:style-name="T5">FOR</text:span><text:span text:style-name="T6"> </text:span><text:span text:style-name="T5">NOT</text:span><text:span text:style-name="T6"> </text:span><text:span text:style-name="T5">FOUND</text:span><text:span text:style-name="T6"> </text:span><text:span text:style-name="T13">SET</text:span><text:span text:style-name="T6"> </text:span><text:span text:style-name="T9">fin_cursor</text:span><text:span text:style-name="T6"> = </text:span><text:span text:style-name="T17">1</text:span><text:span text:style-name="T10">;</text:span></text:p>
            <text:p text:style-name="P5" loext:marker-style-name="T4"><text:span text:style-name="T6"><text:s text:c="4"/></text:span><text:span text:style-name="T21">#Creamos una tabla temporal vacía para ir guardando los datos porque MySQL no tiene un comando</text:span><text:span text:style-name="T42"> </text:span><text:span text:style-name="T21">directo para mostrar los datos generados por el bucle</text:span><text:span text:style-name="T43">:</text:span></text:p>
            <text:p text:style-name="P24" loext:marker-style-name="T4"><text:span text:style-name="T6"><text:s text:c="4"/></text:span><text:span text:style-name="T5">DROP</text:span><text:span text:style-name="T6"> </text:span><text:span text:style-name="T5">TEMPORARY</text:span><text:span text:style-name="T6"> </text:span><text:span text:style-name="T5">TABLE</text:span><text:span text:style-name="T6"> </text:span><text:span text:style-name="T5">IF</text:span><text:span text:style-name="T6"> </text:span><text:span text:style-name="T5">EXISTS</text:span><text:span text:style-name="T6"> </text:span><text:span text:style-name="T9">Temp_Eventos</text:span><text:span text:style-name="T10">;</text:span></text:p>
            <text:p text:style-name="P5" loext:marker-style-name="T4"><text:span text:style-name="T6"><text:s text:c="4"/></text:span><text:span text:style-name="T5">CREATE</text:span><text:span text:style-name="T6"> </text:span><text:span text:style-name="T5">TEMPORARY</text:span><text:span text:style-name="T6"> </text:span><text:span text:style-name="T5">TABLE</text:span><text:span text:style-name="T6"> </text:span><text:span text:style-name="T9">Temp_Eventos</text:span><text:span text:style-name="T6"> (</text:span><text:span text:style-name="T9">idEvento</text:span><text:span text:style-name="T6"> </text:span><text:span text:style-name="T13">INT</text:span><text:span text:style-name="T6">, </text:span><text:span text:style-name="T9">fechaInicio</text:span><text:span text:style-name="T6"> </text:span><text:span text:style-name="T13">DATE</text:span><text:span text:style-name="T6">, </text:span><text:span text:style-name="T9">participantes</text:span><text:span text:style-name="T6"> </text:span><text:span text:style-name="T13">INT</text:span><text:span text:style-name="T6">)</text:span><text:span text:style-name="T10">;</text:span></text:p>
            <text:p text:style-name="P5" loext:marker-style-name="T4"><text:span text:style-name="T6"><text:s text:c="4"/></text:span><text:span text:style-name="T21">-- 4. BUCLE DE LECTURA</text:span></text:p>
            <text:p text:style-name="P5" loext:marker-style-name="T4"><text:span text:style-name="T6"><text:s text:c="4"/><text:tab/></text:span><text:span text:style-name="T21">#Se "ejecuta" el cursor que realiza la consulta SELECT</text:span></text:p>
            <text:p text:style-name="P5" loext:marker-style-name="T4"><text:span text:style-name="T6"><text:s text:c="4"/></text:span><text:span text:style-name="T5">OPEN</text:span><text:span text:style-name="T6"> </text:span><text:span text:style-name="T9">c_eventos</text:span><text:span text:style-name="T10">;</text:span></text:p>
            <text:p text:style-name="P5" loext:marker-style-name="T4"><text:span text:style-name="T6"><text:s text:c="4"/></text:span><text:span text:style-name="T9">mi_bucle</text:span><text:span text:style-name="T6">: </text:span><text:span text:style-name="T5">LOOP</text:span></text:p>
            <text:p text:style-name="P5" loext:marker-style-name="T4"><text:span text:style-name="T6"><text:s text:c="8"/></text:span><text:span text:style-name="T21">-- A. Sacar datos del cursor (FETCH)</text:span></text:p>
            <text:p text:style-name="P5" loext:marker-style-name="T4"><text:span text:style-name="T6"><text:s text:c="8"/></text:span><text:span text:style-name="T5">FETCH</text:span><text:span text:style-name="T6"> </text:span><text:span text:style-name="T9">c_eventos</text:span><text:span text:style-name="T6"> </text:span><text:span text:style-name="T5">INTO</text:span><text:span text:style-name="T6"> </text:span><text:span text:style-name="T9">v_idEvento</text:span><text:span text:style-name="T6">, </text:span><text:span text:style-name="T9">v_fechaInicio</text:span><text:span text:style-name="T6">, </text:span><text:span text:style-name="T9">v_participantes</text:span><text:span text:style-name="T10">;</text:span></text:p>
            <text:p text:style-name="P5" loext:marker-style-name="T4"><text:span text:style-name="T6"><text:s text:c="8"/></text:span><text:span text:style-name="T21">-- B. Comprobar semáforo de salida</text:span></text:p>
            <text:p text:style-name="P5" loext:marker-style-name="T4"><text:span text:style-name="T6"><text:s text:c="8"/></text:span><text:span text:style-name="T5">IF</text:span><text:span text:style-name="T6"> </text:span><text:span text:style-name="T9">fin_cursor</text:span><text:span text:style-name="T6"> = </text:span><text:span text:style-name="T17">1</text:span><text:span text:style-name="T6"> </text:span><text:span text:style-name="T5">THEN</text:span></text:p>
            <text:p text:style-name="P5" loext:marker-style-name="T4"><text:span text:style-name="T6"><text:s text:c="12"/></text:span><text:span text:style-name="T5">LEAVE</text:span><text:span text:style-name="T6"> </text:span><text:span text:style-name="T9">mi_bucle</text:span><text:span text:style-name="T10">;</text:span></text:p>
            <text:p text:style-name="P5" loext:marker-style-name="T4"><text:span text:style-name="T6"><text:s text:c="8"/></text:span><text:span text:style-name="T5">END</text:span><text:span text:style-name="T6"> </text:span><text:span text:style-name="T5">IF</text:span><text:span text:style-name="T10">;</text:span></text:p>
            <text:p text:style-name="P5" loext:marker-style-name="T4"><text:span text:style-name="T6"><text:s text:c="8"/></text:span><text:span text:style-name="T21">-- C. Insertar los datos de las variables en la tabla temporal</text:span></text:p>
            <text:p text:style-name="P5" loext:marker-style-name="T4"><text:span text:style-name="T6"><text:tab/><text:tab/></text:span><text:span text:style-name="T5">INSERT</text:span><text:span text:style-name="T6"> </text:span><text:span text:style-name="T5">INTO</text:span><text:span text:style-name="T6"> </text:span><text:span text:style-name="T39">Temp_Eventos</text:span><text:span text:style-name="T6"> (</text:span><text:span text:style-name="T9">idEvento</text:span><text:span text:style-name="T6">, </text:span><text:span text:style-name="T9">fechaInicio</text:span><text:span text:style-name="T6">, </text:span><text:span text:style-name="T9">participantes</text:span><text:span text:style-name="T6">) </text:span><text:span text:style-name="T5">VALUES</text:span><text:span text:style-name="T6"> (</text:span><text:span text:style-name="T16">v_idEvento</text:span><text:span text:style-name="T6">, </text:span><text:span text:style-name="T44">v_fechaInicio</text:span><text:span text:style-name="T6">, </text:span><text:span text:style-name="T16">v_participantes</text:span><text:span text:style-name="T6">)</text:span><text:span text:style-name="T10">;</text:span><text:span text:style-name="T6"> </text:span></text:p>
            <text:p text:style-name="P5" loext:marker-style-name="T4"><text:span text:style-name="T6"><text:s text:c="4"/></text:span><text:span text:style-name="T5">END</text:span><text:span text:style-name="T6"> </text:span><text:span text:style-name="T5">LOOP</text:span><text:span text:style-name="T6"> </text:span><text:span text:style-name="T9">mi_bucle</text:span><text:span text:style-name="T10">;</text:span></text:p>
            <text:p text:style-name="P5" loext:marker-style-name="T4"><text:span text:style-name="T6"><text:s text:c="4"/></text:span><text:span text:style-name="T5">CLOSE</text:span><text:span text:style-name="T6"> </text:span><text:span text:style-name="T9">c_eventos</text:span><text:span text:style-name="T10">;</text:span></text:p>
            <text:p text:style-name="P5" loext:marker-style-name="T4"><text:span text:style-name="T6"><text:s text:c="4"/></text:span><text:span text:style-name="T21">-- 5. Mostrar los resultados acumulados</text:span></text:p>
            <text:p text:style-name="P5" loext:marker-style-name="T4"><text:span text:style-name="T6"><text:s text:c="4"/></text:span><text:span text:style-name="T5">SELECT</text:span><text:span text:style-name="T6"> * </text:span><text:span text:style-name="T5">FROM</text:span><text:span text:style-name="T6"> </text:span><text:span text:style-name="T16">Temp_Eventos</text:span><text:span text:style-name="T10">;</text:span></text:p>
            <text:p text:style-name="P5" loext:marker-style-name="T4"><text:span text:style-name="T5">END</text:span><text:span text:style-name="T6"> //</text:span></text:p>
            <text:p text:style-name="P5" loext:marker-style-name="T4"><text:span text:style-name="T22">DELIMITER</text:span><text:span text:style-name="T9"> ;</text:span></text:p>
            <text:p text:style-name="P5" loext:marker-style-name="T4"><text:span text:style-name="T21"># Llamada de prueba</text:span><text:span text:style-name="T21"/></text:p>
            <text:p text:style-name="P18"><text:span text:style-name="T5">CALL</text:span><text:span text:style-name="T6"> </text:span><text:span text:style-name="T16">cursor_eventos_mas_5</text:span><text:span text:style-name="T6">()</text:span><text:span text:style-name="T10">;</text:span></text:p>
          </table:table-cell>
        </table:table-row>
      </table:table>
      <text:p text:style-name="P20"><text:soft-page-break/></text:p>
      <text:p text:style-name="P20"/>
      <text:p text:style-name="P20"><draw:frame draw:style-name="fr4" draw:name="Imagen16" text:anchor-type="char" svg:x="3.209cm" svg:y="0.295cm" svg:width="9.527cm" svg:height="14.739cm" draw:z-index="15"><draw:image xlink:href="Pictures/10000001000001680000022D831DAD1D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list text:continue-numbering="true" text:style-name="L1">
        <text:list-item>
          <text:p text:style-name="P11"><text:soft-page-break/><text:span text:style-name="T18">Triggers:</text:span></text:p>
          <text:list>
            <text:list-item>
              <text:p text:style-name="P25">Crea un trigger <text:span text:style-name="T45">llamado </text:span><text:span text:style-name="T46">trigger_check_evento</text:span> que no deje insertar registros en la tabla <text:span text:style-name="Source_20_Text">PorciEvento_Cercado</text:span> si el identificador del evento no existe dentro de la tabla <text:span text:style-name="Source_20_Text">PorciEvento</text:span>. </text:p>
            </text:list-item>
          </text:list>
        </text:list-item>
      </text:list>
      <table:table table:name="Táboa9" table:style-name="Táboa9">
        <table:table-column table:style-name="Táboa9.A"/>
        <table:table-row>
          <table:table-cell table:style-name="Táboa9.A1" office:value-type="string">
            <text:p text:style-name="P5" loext:marker-style-name="T4"><text:span text:style-name="T21"># Borramos el trigger si existe</text:span></text:p>
            <text:p text:style-name="P5" loext:marker-style-name="T4"><text:span text:style-name="T5">DROP</text:span><text:span text:style-name="T6"> </text:span><text:span text:style-name="T5">TRIGGER</text:span><text:span text:style-name="T6"> </text:span><text:span text:style-name="T5">IF</text:span><text:span text:style-name="T6"> </text:span><text:span text:style-name="T5">EXISTS</text:span><text:span text:style-name="T6"> </text:span><text:span text:style-name="T9">trigger_check_evento</text:span><text:span text:style-name="T10">;</text:span></text:p>
            <text:p text:style-name="P13" loext:marker-style-name="T4"/>
            <text:p text:style-name="P5" loext:marker-style-name="T4"><text:span text:style-name="T22">DELIMITER</text:span><text:span text:style-name="T9"> //</text:span></text:p>
            <text:p text:style-name="P13" loext:marker-style-name="T4"/>
            <text:p text:style-name="P5" loext:marker-style-name="T4"><text:span text:style-name="T5">CREATE</text:span><text:span text:style-name="T6"> </text:span><text:span text:style-name="T5">TRIGGER</text:span><text:span text:style-name="T6"> </text:span><text:span text:style-name="T9">trigger_check_evento</text:span></text:p>
            <text:p text:style-name="P5" loext:marker-style-name="T4"><text:span text:style-name="T5">BEFORE</text:span><text:span text:style-name="T6"> </text:span><text:span text:style-name="T5">INSERT</text:span><text:span text:style-name="T6"> </text:span><text:span text:style-name="T5">ON</text:span><text:span text:style-name="T6"> </text:span><text:span text:style-name="T9">PorciEvento_Cercado</text:span></text:p>
            <text:p text:style-name="P5" loext:marker-style-name="T4"><text:span text:style-name="T5">FOR</text:span><text:span text:style-name="T6"> </text:span><text:span text:style-name="T5">EACH</text:span><text:span text:style-name="T6"> </text:span><text:span text:style-name="T5">ROW</text:span><text:span text:style-name="T6"> </text:span><text:span text:style-name="T21">#Se comprueba fila a fila.</text:span></text:p>
            <text:p text:style-name="P5" loext:marker-style-name="T4"><text:span text:style-name="T5">BEGIN</text:span><text:span text:style-name="T5"/></text:p>
            <text:p text:style-name="P5" loext:marker-style-name="T4"><text:span text:style-name="T6"><text:s text:c="4"/></text:span><text:span text:style-name="T21">#1. Declaramos una variable para guardar el evento si existe</text:span></text:p>
            <text:p text:style-name="P5" loext:marker-style-name="T4"><text:span text:style-name="T6"><text:s text:c="4"/></text:span><text:span text:style-name="T5">DECLARE</text:span><text:span text:style-name="T6"> </text:span><text:span text:style-name="T9">v_existe</text:span><text:span text:style-name="T6"> </text:span><text:span text:style-name="T13">INT</text:span><text:span text:style-name="T10">;</text:span></text:p>
            <text:p text:style-name="P13" loext:marker-style-name="T4"/>
            <text:p text:style-name="P5" loext:marker-style-name="T4"><text:span text:style-name="T6"><text:s text:c="4"/></text:span><text:span text:style-name="T21">#2. Hacemos la consulta contando las coincidencias</text:span></text:p>
            <text:p text:style-name="P5" loext:marker-style-name="T4"><text:span text:style-name="T6"><text:s text:c="4"/></text:span><text:span text:style-name="T5">SELECT</text:span><text:span text:style-name="T6"> </text:span><text:span text:style-name="T13">COUNT</text:span><text:span text:style-name="T6">(*) </text:span><text:span text:style-name="T5">INTO</text:span><text:span text:style-name="T6"> </text:span><text:span text:style-name="T16">v_existe</text:span></text:p>
            <text:p text:style-name="P5" loext:marker-style-name="T4"><text:span text:style-name="T6"><text:s text:c="4"/></text:span><text:span text:style-name="T5">FROM</text:span><text:span text:style-name="T6"> </text:span><text:span text:style-name="T7">PorciEvento</text:span><text:span text:style-name="T6"> </text:span><text:span text:style-name="T23">pe</text:span></text:p>
            <text:p text:style-name="P5" loext:marker-style-name="T4"><text:span text:style-name="T6"><text:s text:c="4"/></text:span><text:span text:style-name="T5">WHERE</text:span><text:span text:style-name="T6"> <text:s/></text:span><text:span text:style-name="T23">pe</text:span><text:span text:style-name="T6">.</text:span><text:span text:style-name="T8">idEvento</text:span><text:span text:style-name="T6">= </text:span><text:span text:style-name="T47">NEW</text:span><text:span text:style-name="T15">.</text:span><text:span text:style-name="T16">idEvento</text:span><text:span text:style-name="T10">;</text:span></text:p>
            <text:p text:style-name="P13" loext:marker-style-name="T4"/>
            <text:p text:style-name="P5" loext:marker-style-name="T4"><text:span text:style-name="T6"><text:s text:c="4"/></text:span><text:span text:style-name="T21">#3. Si no existe (es 0), lanzamos el error</text:span></text:p>
            <text:p text:style-name="P5" loext:marker-style-name="T4"><text:span text:style-name="T6"><text:s text:c="4"/></text:span><text:span text:style-name="T5">IF</text:span><text:span text:style-name="T6"> </text:span><text:span text:style-name="T9">v_existe</text:span><text:span text:style-name="T6"> = </text:span><text:span text:style-name="T17">0</text:span><text:span text:style-name="T6"> </text:span><text:span text:style-name="T5">THEN</text:span></text:p>
            <text:p text:style-name="P5" loext:marker-style-name="T4"><text:span text:style-name="T6"><text:s text:c="8"/></text:span><text:span text:style-name="T5">SIGNAL</text:span><text:span text:style-name="T6"> </text:span><text:span text:style-name="T5">SQLSTATE</text:span><text:span text:style-name="T6"> </text:span><text:span text:style-name="T48">'45000'</text:span><text:span text:style-name="T6"> </text:span></text:p>
            <text:p text:style-name="P5" loext:marker-style-name="T4"><text:span text:style-name="T6"><text:s text:c="8"/></text:span><text:span text:style-name="T13">SET</text:span><text:span text:style-name="T6"> </text:span><text:span text:style-name="T9">MESSAGE_TEXT</text:span><text:span text:style-name="T6"> = </text:span><text:span text:style-name="T48">'Error: El identificador del evento no existe en la tabla PorciEvento.'</text:span><text:span text:style-name="T10">;</text:span></text:p>
            <text:p text:style-name="P5" loext:marker-style-name="T4"><text:span text:style-name="T6"><text:s text:c="4"/></text:span><text:span text:style-name="T5">END</text:span><text:span text:style-name="T6"> </text:span><text:span text:style-name="T5">IF</text:span><text:span text:style-name="T10">;</text:span></text:p>
            <text:p text:style-name="P13" loext:marker-style-name="T4"/>
            <text:p text:style-name="P5" loext:marker-style-name="T4"><text:span text:style-name="T5">END</text:span><text:span text:style-name="T6"> //</text:span></text:p>
            <text:p text:style-name="P13" loext:marker-style-name="T4"/>
            <text:p text:style-name="P5" loext:marker-style-name="T4"><text:span text:style-name="T22">DELIMITER</text:span><text:span text:style-name="T9"> ;</text:span></text:p>
            <text:p text:style-name="P13" loext:marker-style-name="T4"/>
            <text:p text:style-name="P13" loext:marker-style-name="T4"/>
            <text:p text:style-name="P5" loext:marker-style-name="T4"><text:span text:style-name="T21"># Prueba 5.A: Forzar inserción con evento inexistente</text:span><text:span text:style-name="T21"/></text:p>
            <text:p text:style-name="P5" loext:marker-style-name="T4"><text:span text:style-name="T5">INSERT</text:span><text:span text:style-name="T6"> </text:span><text:span text:style-name="T5">INTO</text:span><text:span text:style-name="T6"> </text:span><text:span text:style-name="T7">PorciEvento_Cercado</text:span><text:span text:style-name="T6"> (</text:span><text:span text:style-name="T8">idPorcino</text:span><text:span text:style-name="T6">, </text:span><text:span text:style-name="T8">idEvento</text:span><text:span text:style-name="T6">, </text:span><text:span text:style-name="T8">intensidad</text:span><text:span text:style-name="T6">) </text:span></text:p>
            <text:p text:style-name="P18"><text:span text:style-name="T5">VALUES</text:span><text:span text:style-name="T6"> (</text:span><text:span text:style-name="T17">1</text:span><text:span text:style-name="T6">, </text:span><text:span text:style-name="T17">9999</text:span><text:span text:style-name="T6">, </text:span><text:span text:style-name="T17">5</text:span><text:span text:style-name="T6">)</text:span><text:span text:style-name="T10">;</text:span><text:span text:style-name="T6"> </text:span></text:p>
            <text:p text:style-name="P5" loext:marker-style-name="T4"><text:span text:style-name="T21">-- Resultado esperado: La consulta debe fallar y el gestor de BBDD mostrará:</text:span></text:p>
            <text:p text:style-name="P26"><text:span text:style-name="T49">-- "Error: El identificador del evento no existe en la tabla PorciEvento."</text:span></text:p>
          </table:table-cell>
        </table:table-row>
      </table:table>
      <text:p text:style-name="P20"/>
      <text:p text:style-name="P20"><draw:frame draw:style-name="fr5" draw:name="Imagen17" text:anchor-type="char" svg:width="17cm" svg:height="2.605cm" draw:z-index="17"><draw:image xlink:href="Pictures/10000001000002EE00000073024D7ED6.png" xlink:type="simple" xlink:show="embed" xlink:actuate="onLoad" draw:mime-type="image/png"/></draw:frame></text:p>
      <text:p text:style-name="P20"/>
      <text:p text:style-name="P20"/>
      <text:p text:style-name="P20"><text:soft-page-break/></text:p>
      <text:list text:continue-numbering="true" text:style-name="L1">
        <text:list-item>
          <text:list>
            <text:list-item>
              <text:p text:style-name="P25">Crea un trigger <text:span text:style-name="T45">llamado</text:span> <text:span text:style-name="T46">trigger</text:span><text:span text:style-name="T50">_validar_intensidad</text:span><text:span text:style-name="T51"> </text:span>que se ejecute antes de insertar o actualizar registros en la tabla <text:span text:style-name="Source_20_Text">PorciEvento_Cercado</text:span>.</text:p>
            </text:list-item>
          </text:list>
        </text:list-item>
      </text:list>
      <text:p text:style-name="P27">El trigger deberá garantizar que el valor del campo <text:span text:style-name="Source_20_Text">Intensidad</text:span> esté comprendido entre 1 y 10 (ambos incluidos). En caso de que el valor introducido sea inferior a 1 o superior a 10, el sistema deberá impedir la operación y lanzar un mensaje de error indicando que la intensidad no es válida.</text:p>
      <text:p text:style-name="P27">Este control tiene como objetivo asegurar la integridad de los datos relativos a la participación de los porcinos en los eventos.</text:p>
      <table:table table:name="Táboa10" table:style-name="Táboa10">
        <table:table-column table:style-name="Táboa10.A"/>
        <table:table-row>
          <table:table-cell table:style-name="Táboa10.A1" office:value-type="string">
            <text:p text:style-name="P5" loext:marker-style-name="T4"><text:span text:style-name="T21"># 2. TRIGGER PARA CUANDO SE ACTUALIZA UN REGISTRO EXISTENTE</text:span></text:p>
            <text:p text:style-name="P13" loext:marker-style-name="T4"/>
            <text:p text:style-name="P5" loext:marker-style-name="T4"><text:span text:style-name="T5">DROP</text:span><text:span text:style-name="T6"> </text:span><text:span text:style-name="T5">TRIGGER</text:span><text:span text:style-name="T6"> </text:span><text:span text:style-name="T5">IF</text:span><text:span text:style-name="T6"> </text:span><text:span text:style-name="T5">EXISTS</text:span><text:span text:style-name="T6"> </text:span><text:span text:style-name="T9">trigger_validar_intensidad_update</text:span><text:span text:style-name="T10">;</text:span></text:p>
            <text:p text:style-name="P13" loext:marker-style-name="T4"/>
            <text:p text:style-name="P5" loext:marker-style-name="T4"><text:span text:style-name="T22">DELIMITER</text:span><text:span text:style-name="T9"> //</text:span></text:p>
            <text:p text:style-name="P5" loext:marker-style-name="T4"><text:span text:style-name="T5">CREATE</text:span><text:span text:style-name="T6"> </text:span><text:span text:style-name="T5">TRIGGER</text:span><text:span text:style-name="T6"> </text:span><text:span text:style-name="T9">trigger_validar_intensidad_update</text:span></text:p>
            <text:p text:style-name="P5" loext:marker-style-name="T4"><text:span text:style-name="T5">BEFORE</text:span><text:span text:style-name="T6"> </text:span><text:span text:style-name="T5">UPDATE</text:span><text:span text:style-name="T6"> </text:span><text:span text:style-name="T5">ON</text:span><text:span text:style-name="T6"> </text:span><text:span text:style-name="T9">PorciEvento_Cercado</text:span></text:p>
            <text:p text:style-name="P5" loext:marker-style-name="T4"><text:span text:style-name="T5">FOR</text:span><text:span text:style-name="T6"> </text:span><text:span text:style-name="T5">EACH</text:span><text:span text:style-name="T6"> </text:span><text:span text:style-name="T5">ROW</text:span></text:p>
            <text:p text:style-name="P5" loext:marker-style-name="T4"><text:span text:style-name="T5">BEGIN</text:span><text:span text:style-name="T5"/></text:p>
            <text:p text:style-name="P5" loext:marker-style-name="T4"><text:span text:style-name="T6"><text:s text:c="4"/></text:span><text:span text:style-name="T5">IF</text:span><text:span text:style-name="T6"> </text:span><text:span text:style-name="T5">NEW</text:span><text:span text:style-name="T6">.</text:span><text:span text:style-name="T9">intensidad</text:span><text:span text:style-name="T6"> &lt; </text:span><text:span text:style-name="T17">1</text:span><text:span text:style-name="T6"> </text:span><text:span text:style-name="T5">OR</text:span><text:span text:style-name="T6"> </text:span><text:span text:style-name="T5">NEW</text:span><text:span text:style-name="T6">.</text:span><text:span text:style-name="T9">intensidad</text:span><text:span text:style-name="T6"> &gt; </text:span><text:span text:style-name="T17">10</text:span><text:span text:style-name="T6"> </text:span><text:span text:style-name="T5">THEN</text:span><text:span text:style-name="T6"> </text:span><text:span text:style-name="T21">#NEW.intensidad sería un nuevo valor para sustituir el anterior.</text:span></text:p>
            <text:p text:style-name="P5" loext:marker-style-name="T4"><text:span text:style-name="T6"><text:s text:c="8"/></text:span><text:span text:style-name="T5">SIGNAL</text:span><text:span text:style-name="T6"> </text:span><text:span text:style-name="T5">SQLSTATE</text:span><text:span text:style-name="T6"> </text:span><text:span text:style-name="T48">'45000'</text:span><text:span text:style-name="T6"> </text:span></text:p>
            <text:p text:style-name="P5" loext:marker-style-name="T4"><text:span text:style-name="T6"><text:s text:c="8"/></text:span><text:span text:style-name="T13">SET</text:span><text:span text:style-name="T6"> </text:span><text:span text:style-name="T9">MESSAGE_TEXT</text:span><text:span text:style-name="T6"> = </text:span><text:span text:style-name="T48">'Error: La intensidad no es válida. Debe estar entre 1 y 10.'</text:span><text:span text:style-name="T10">;</text:span></text:p>
            <text:p text:style-name="P5" loext:marker-style-name="T4"><text:span text:style-name="T6"><text:s text:c="4"/></text:span><text:span text:style-name="T5">END</text:span><text:span text:style-name="T6"> </text:span><text:span text:style-name="T5">IF</text:span><text:span text:style-name="T10">;</text:span></text:p>
            <text:p text:style-name="P5" loext:marker-style-name="T4"><text:span text:style-name="T5">END</text:span><text:span text:style-name="T6"> //</text:span></text:p>
            <text:p text:style-name="P5" loext:marker-style-name="T4"><text:span text:style-name="T22">DELIMITER</text:span><text:span text:style-name="T9"> ;</text:span></text:p>
            <text:p text:style-name="P13" loext:marker-style-name="T4"/>
            <text:p text:style-name="P13" loext:marker-style-name="T4"/>
            <text:p text:style-name="P5" loext:marker-style-name="T4"><text:span text:style-name="T21"># Prueba (UPDATE): Forzar actualización con intensidad inferior a 1</text:span><text:span text:style-name="T21"/></text:p>
            <text:p text:style-name="P13" loext:marker-style-name="T4"/>
            <text:p text:style-name="P5" loext:marker-style-name="T4"><text:span text:style-name="T5">UPDATE</text:span><text:span text:style-name="T6"> </text:span><text:span text:style-name="T7">PorciEvento_Cercado</text:span><text:span text:style-name="T6"> </text:span></text:p>
            <text:p text:style-name="P5" loext:marker-style-name="T4"><text:span text:style-name="T13">SET</text:span><text:span text:style-name="T6"> </text:span><text:span text:style-name="T8">intensidad</text:span><text:span text:style-name="T6"> = </text:span><text:span text:style-name="T17">0</text:span><text:span text:style-name="T6"> </text:span></text:p>
            <text:p text:style-name="P18"><text:span text:style-name="T5">WHERE</text:span><text:span text:style-name="T6"> </text:span><text:span text:style-name="T8">idPorcino</text:span><text:span text:style-name="T6"> = </text:span><text:span text:style-name="T17">1</text:span><text:span text:style-name="T6"> </text:span><text:span text:style-name="T5">AND</text:span><text:span text:style-name="T6"> </text:span><text:span text:style-name="T8">idEvento</text:span><text:span text:style-name="T6"> = </text:span><text:span text:style-name="T17">1</text:span><text:span text:style-name="T10">;</text:span></text:p>
          </table:table-cell>
        </table:table-row>
      </table:table>
      <text:p text:style-name="P20"/>
      <text:p text:style-name="P28"/>
      <text:p text:style-name="P29"><draw:frame draw:style-name="fr3" draw:name="Imagen18" text:anchor-type="char" svg:width="16.501cm" svg:height="2.42cm" draw:z-index="16"><draw:image xlink:href="Pictures/10000001000002BE00000067A82C0C00.png" xlink:type="simple" xlink:show="embed" xlink:actuate="onLoad" draw:mime-type="image/png"/></draw:frame><text:span text:style-name="T5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Consolas" svg:font-family="Consolas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wiss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1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gl" fo:country="ES" style:letter-kerning="true" style:font-name-asian="NSimSun1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>
      <style:text-properties style:font-name="Calibri" fo:font-family="Calibri" style:font-family-generic="swiss" style:font-pitch="variable" fo:font-size="10pt" style:font-size-asian="8.75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acronym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loext:graphic-properties draw:fill="solid" draw:fill-color="#ffa07a" draw:fill-gradient-name="gradient" draw:fill-hatch-name="hatch"/>
      <style:paragraph-properties fo:background-color="#ffa07a" fo:padding="0.049cm" fo:border="0.74pt solid #000000" style:join-border="false"/>
      <style:text-properties fo:color="#ffffff" loext:opacity="100%" style:font-name="Lucida Sans1" officeooo:rsid="0019cead" officeooo:paragraph-rsid="00ad06a7"/>
    </style:style>
    <style:style style:name="MP2" style:family="paragraph" style:parent-style-name="Header">
      <loext:graphic-properties draw:fill="solid" draw:fill-color="#ffa07a" draw:fill-gradient-name="gradient" draw:fill-hatch-name="hatch"/>
      <style:paragraph-properties fo:text-align="end" style:justify-single-word="false" fo:background-color="#ffa07a" fo:padding="0.049cm" fo:border="0.74pt solid #000000" style:join-border="false"/>
      <style:text-properties fo:color="#ffffff" loext:opacity="100%" style:font-name="Lucida Sans1" officeooo:rsid="016d9987" officeooo:paragraph-rsid="016d9987"/>
    </style:style>
    <style:style style:name="MP3" style:family="paragraph" style:parent-style-name="Footer">
      <style:paragraph-properties fo:text-align="center" style:justify-single-word="false" fo:padding="0.049cm" fo:border-left="none" fo:border-right="none" fo:border-top="0.74pt solid #000000" fo:border-bottom="none" style:join-border="false"/>
      <style:text-properties fo:font-size="8pt" style:font-size-asian="8pt" style:font-size-complex="8pt"/>
    </style:style>
    <style:style style:name="MP4" style:family="paragraph" style:parent-style-name="Footer">
      <style:paragraph-properties fo:text-align="end" style:justify-single-word="false" fo:padding="0.049cm" fo:border-left="none" fo:border-right="none" fo:border-top="0.74pt solid #000000" fo:border-bottom="none" style:join-border="false"/>
      <style:text-properties fo:font-size="8pt" style:font-size-asian="8pt" style:font-size-complex="8pt"/>
    </style:style>
    <style:style style:name="MP5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style style:name="MT1" style:family="text">
      <style:text-properties officeooo:rsid="0129ff9c"/>
    </style:style>
    <style:style style:name="MT2" style:family="text">
      <style:text-properties officeooo:rsid="0144a13c"/>
    </style:style>
    <style:page-layout style:name="Mpm1">
      <style:page-layout-properties fo:page-width="21.001cm" fo:page-height="29.7cm" style:num-format="1" style:print-orientation="portrait" fo:margin-top="1.799cm" fo:margin-bottom="1.7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D0<text:span text:style-name="MT1">6</text:span>-SOLUCIÓN TAREA <text:span text:style-name="MT2">1</text:span></text:p>
        <text:p text:style-name="MP2">PEREZ CARRAL, SANTIAGO</text:p>
      </style:header>
      <style:footer>
        <text:p text:style-name="MP3"><text:bookmark-start text:name="PageNumWizard_FOOTER_Estilo de página predeterminado9"/><text:page-number text:select-page="current">11</text:page-number><text:s/>/ <loext:page-count-range>12</loext:page-count-range><text:bookmark-end text:name="PageNumWizard_FOOTER_Estilo de página predeterminado9"/></text:p>
        <text:p text:style-name="MP4"><text:bookmark-start text:name="PageNumWizard_FOOTER_Estilo de páxina predeterminado1"/><text:page-number text:select-page="current">11</text:page-number><text:bookmark-end text:name="PageNumWizard_FOOTER_Estilo de páxina predeterminado1"/></text:p>
      </style:footer>
      <style:footer-left>
        <text:p text:style-name="MP5"><text:bookmark-start text:name="PageNumWizard_FOOTER_Estilo de páxina predeterminado2"/><text:page-number text:select-page="current">12</text:page-number><text:bookmark-end text:name="PageNumWizard_FOOTER_Estilo de páxina predeterminado2"/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09-22T18:04:04.684000000</meta:creation-date>
    <dc:date>2026-04-29T10:37:00.907525600</dc:date>
    <meta:editing-duration>PT18H22M4S</meta:editing-duration>
    <meta:editing-cycles>279</meta:editing-cycles>
    <meta:generator>LibreOffice/25.8.5.2$Windows_X86_64 LibreOffice_project/9c8b85f387cc00a89945a79c9e6239f32e450ac2</meta:generator>
    <meta:print-date>2025-05-04T14:48:10.934000000</meta:print-date>
    <meta:printed-by>Archivos PDF</meta:printed-by>
    <meta:document-statistic meta:table-count="10" meta:image-count="19" meta:object-count="0" meta:page-count="12" meta:paragraph-count="264" meta:word-count="1529" meta:character-count="11640" meta:non-whitespace-character-count="9837"/>
  </office:meta>
</office:document-meta>
</file>